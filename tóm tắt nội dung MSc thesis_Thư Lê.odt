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7800000043879DA9A8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roman" style:font-pitch="variable" style:font-charset="x-symbol"/>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style:font-face style:name="Times New Roman" svg:font-family="'Times New Roman'"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Heading_20_1">
      <style:paragraph-properties fo:line-height="115%" fo:text-align="left" style:justify-single-word="false"/>
      <style:text-properties officeooo:paragraph-rsid="00110e19"/>
    </style:style>
    <style:style style:name="P2" style:family="paragraph" style:parent-style-name="List_20_Paragraph" style:list-style-name="WWNum7">
      <style:paragraph-properties fo:line-height="115%" fo:text-align="justify" style:justify-single-word="false"/>
      <style:text-properties officeooo:paragraph-rsid="00110e19"/>
    </style:style>
    <style:style style:name="P3" style:family="paragraph" style:parent-style-name="List_20_Paragraph" style:list-style-name="WWNum4">
      <style:paragraph-properties fo:line-height="115%" fo:text-align="justify" style:justify-single-word="false"/>
      <style:text-properties officeooo:paragraph-rsid="00110e19"/>
    </style:style>
    <style:style style:name="P4" style:family="paragraph" style:parent-style-name="List_20_Paragraph" style:list-style-name="WWNum4">
      <style:paragraph-properties fo:line-height="115%" fo:text-align="justify" style:justify-single-word="false"/>
      <style:text-properties fo:color="#000000" loext:opacity="100%" fo:font-size="13pt" officeooo:paragraph-rsid="00110e19" style:font-size-asian="13pt" style:font-size-complex="13pt"/>
    </style:style>
    <style:style style:name="P5" style:family="paragraph" style:parent-style-name="List_20_Paragraph">
      <style:paragraph-properties fo:line-height="115%" fo:text-align="justify" style:justify-single-word="false"/>
      <style:text-properties fo:color="#000000" loext:opacity="100%" fo:font-size="13pt" officeooo:rsid="0012192b" officeooo:paragraph-rsid="0012192b" style:font-size-asian="13pt" style:font-size-complex="13pt"/>
    </style:style>
    <style:style style:name="P6" style:family="paragraph" style:parent-style-name="Standard">
      <style:paragraph-properties fo:line-height="115%" fo:text-align="justify" style:justify-single-word="false" fo:text-indent="0.5in" style:auto-text-indent="false"/>
      <style:text-properties fo:color="#000000" loext:opacity="100%" fo:font-size="13pt" officeooo:paragraph-rsid="00141bde" style:font-size-asian="13pt" style:font-size-complex="13pt"/>
    </style:style>
    <style:style style:name="P7" style:family="paragraph" style:parent-style-name="Heading_20_1">
      <style:paragraph-properties fo:text-align="left" style:justify-single-word="false"/>
      <style:text-properties fo:font-size="16pt" style:font-size-asian="16pt" style:font-size-complex="16pt"/>
    </style:style>
    <style:style style:name="P8" style:family="paragraph" style:parent-style-name="Standard">
      <style:paragraph-properties fo:margin-left="0in" fo:line-height="115%" fo:text-align="justify" style:justify-single-word="false" fo:text-indent="0in" style:auto-text-indent="false"/>
      <style:text-properties officeooo:paragraph-rsid="00141bde"/>
    </style:style>
    <style:style style:name="P9" style:family="paragraph" style:parent-style-name="Standard">
      <style:paragraph-properties fo:line-height="115%" fo:text-align="justify" style:justify-single-word="false" fo:text-indent="0.5in" style:auto-text-indent="false"/>
      <style:text-properties officeooo:paragraph-rsid="00141bde"/>
    </style:style>
    <style:style style:name="P10" style:family="paragraph" style:parent-style-name="List_20_Paragraph" style:list-style-name="WWNum4">
      <style:paragraph-properties fo:line-height="115%" fo:text-align="justify" style:justify-single-word="false"/>
      <style:text-properties officeooo:paragraph-rsid="00141bde"/>
    </style:style>
    <style:style style:name="P11" style:family="paragraph" style:parent-style-name="Standard">
      <style:paragraph-properties fo:margin-left="0.4925in" fo:line-height="115%" fo:text-align="justify" style:justify-single-word="false"/>
      <style:text-properties officeooo:paragraph-rsid="00141bde"/>
    </style:style>
    <style:style style:name="P12" style:family="paragraph" style:parent-style-name="List_20_Paragraph">
      <style:paragraph-properties fo:line-height="115%" fo:text-align="justify" style:justify-single-word="false"/>
      <style:text-properties officeooo:paragraph-rsid="00141bde"/>
    </style:style>
    <style:style style:name="P13" style:family="paragraph" style:parent-style-name="Heading_20_2" style:list-style-name="WWNum9">
      <style:paragraph-properties fo:margin-left="0.75in" fo:line-height="115%" fo:text-indent="-0.25in" style:auto-text-indent="false"/>
      <style:text-properties officeooo:paragraph-rsid="00230be2"/>
    </style:style>
    <style:style style:name="P14" style:family="paragraph" style:parent-style-name="Standard">
      <style:paragraph-properties fo:line-height="115%" fo:text-align="justify" style:justify-single-word="false" fo:text-indent="0.5in" style:auto-text-indent="false"/>
      <style:text-properties officeooo:paragraph-rsid="00230be2"/>
    </style:style>
    <style:style style:name="P15" style:family="paragraph" style:parent-style-name="Standard">
      <style:paragraph-properties fo:line-height="115%" fo:text-align="justify" style:justify-single-word="false" fo:text-indent="0.5in" style:auto-text-indent="false"/>
      <style:text-properties fo:color="#000000" loext:opacity="100%" fo:font-size="13pt" officeooo:rsid="0024dd85" officeooo:paragraph-rsid="0024dd85" style:font-size-asian="13pt" style:font-size-complex="13pt"/>
    </style:style>
    <style:style style:name="P16" style:family="paragraph" style:parent-style-name="Standard">
      <style:paragraph-properties fo:line-height="115%" fo:text-align="justify" style:justify-single-word="false" fo:text-indent="0.5in" style:auto-text-indent="false"/>
      <style:text-properties fo:color="#000000" loext:opacity="100%" fo:font-size="13pt" officeooo:paragraph-rsid="00230be2" style:font-size-asian="13pt" style:font-size-complex="13pt"/>
    </style:style>
    <style:style style:name="P17" style:family="paragraph" style:parent-style-name="List_20_Paragraph">
      <style:paragraph-properties fo:margin-left="0in" fo:line-height="115%" fo:text-align="justify" style:justify-single-word="false" fo:text-indent="0in" style:auto-text-indent="false"/>
      <style:text-properties fo:color="#000000" loext:opacity="100%" fo:font-size="13pt" officeooo:rsid="0012192b" officeooo:paragraph-rsid="0031755a" style:font-size-asian="13pt" style:font-size-complex="13pt"/>
    </style:style>
    <style:style style:name="P18" style:family="paragraph" style:parent-style-name="List_20_Paragraph" style:list-style-name="WWNum1">
      <style:text-properties officeooo:paragraph-rsid="00141bde"/>
    </style:style>
    <style:style style:name="P19" style:family="paragraph" style:parent-style-name="List_20_Paragraph" style:list-style-name="L1">
      <style:paragraph-properties fo:margin-left="0in" fo:text-indent="0in" style:auto-text-indent="false"/>
      <style:text-properties officeooo:paragraph-rsid="00141bde"/>
    </style:style>
    <style:style style:name="P20" style:family="paragraph" style:parent-style-name="List_20_Paragraph" style:list-style-name="L1">
      <style:paragraph-properties fo:margin-left="0in" fo:text-indent="0in" style:auto-text-indent="false"/>
      <style:text-properties officeooo:paragraph-rsid="001812a3"/>
    </style:style>
    <style:style style:name="P21" style:family="paragraph" style:parent-style-name="List_20_Paragraph" style:list-style-name="L1">
      <style:paragraph-properties fo:margin-left="0in" fo:text-indent="0in" style:auto-text-indent="false"/>
      <style:text-properties officeooo:rsid="00141bde" officeooo:paragraph-rsid="001598e6"/>
    </style:style>
    <style:style style:name="P22" style:family="paragraph" style:parent-style-name="List_20_Paragraph">
      <style:paragraph-properties fo:margin-left="0in" fo:line-height="115%" fo:text-align="justify" style:justify-single-word="false" fo:text-indent="0in" style:auto-text-indent="false" style:writing-mode="lr-tb" style:writing-mode-automatic="false"/>
      <style:text-properties fo:color="#ff0000" loext:opacity="100%" fo:font-size="13pt" fo:font-weight="bold" officeooo:paragraph-rsid="00110e19" style:font-size-asian="13pt" style:font-weight-asian="bold" style:font-size-complex="13pt" style:font-weight-complex="bold"/>
    </style:style>
    <style:style style:name="P23" style:family="paragraph" style:parent-style-name="List_20_Paragraph">
      <style:paragraph-properties fo:margin-left="0in" fo:line-height="115%" fo:text-align="justify" style:justify-single-word="false" fo:text-indent="0in" style:auto-text-indent="false" style:writing-mode="lr-tb" style:writing-mode-automatic="false"/>
      <style:text-properties officeooo:paragraph-rsid="0031755a"/>
    </style:style>
    <style:style style:name="P24" style:family="paragraph" style:parent-style-name="List_20_Paragraph" style:list-style-name="L2">
      <style:text-properties officeooo:rsid="00353262" officeooo:paragraph-rsid="00353262"/>
    </style:style>
    <style:style style:name="P25" style:family="paragraph" style:parent-style-name="List_20_Paragraph" style:list-style-name="L2">
      <style:text-properties officeooo:rsid="0035422f" officeooo:paragraph-rsid="0035422f"/>
    </style:style>
    <style:style style:name="P26" style:family="paragraph" style:parent-style-name="List_20_Paragraph" style:list-style-name="L2">
      <style:text-properties officeooo:rsid="0015f57d" officeooo:paragraph-rsid="001812a3"/>
    </style:style>
    <style:style style:name="P27" style:family="paragraph" style:parent-style-name="List_20_Paragraph" style:list-style-name="L2">
      <style:text-properties officeooo:rsid="001bd85e" officeooo:paragraph-rsid="001bd85e"/>
    </style:style>
    <style:style style:name="P28" style:family="paragraph" style:parent-style-name="List_20_Paragraph" style:list-style-name="L2">
      <style:text-properties officeooo:paragraph-rsid="0046cc9b"/>
    </style:style>
    <style:style style:name="P29" style:family="paragraph" style:parent-style-name="Standard">
      <style:paragraph-properties fo:line-height="115%" fo:text-align="justify" style:justify-single-word="false" fo:text-indent="0.5in" style:auto-text-indent="false" loext:word-spacing-minimum="75%" loext:word-spacing-maximum="133%"/>
      <style:text-properties fo:font-size="12pt" officeooo:paragraph-rsid="0018930a" style:font-size-asian="12pt" style:font-size-complex="12pt"/>
    </style:style>
    <style:style style:name="P30" style:family="paragraph" style:parent-style-name="Standard">
      <style:paragraph-properties fo:line-height="115%" fo:text-align="justify" style:justify-single-word="false" fo:text-indent="0.5in" style:auto-text-indent="false"/>
      <style:text-properties fo:font-size="12pt" officeooo:paragraph-rsid="0018930a" style:font-size-asian="12pt" style:font-size-complex="12pt"/>
    </style:style>
    <style:style style:name="P31" style:family="paragraph" style:parent-style-name="Standard">
      <style:paragraph-properties fo:line-height="115%" fo:text-align="justify" style:justify-single-word="false" fo:text-indent="0.5in" style:auto-text-indent="false"/>
      <style:text-properties fo:font-size="12pt" officeooo:paragraph-rsid="001a050b" style:font-size-asian="12pt" style:font-size-complex="12pt"/>
    </style:style>
    <style:style style:name="P32" style:family="paragraph" style:parent-style-name="Standard">
      <style:paragraph-properties fo:line-height="115%" fo:text-align="center" style:justify-single-word="false"/>
      <style:text-properties fo:font-size="12pt" officeooo:paragraph-rsid="001a050b" style:font-size-asian="12pt" style:font-size-complex="12pt"/>
    </style:style>
    <style:style style:name="P33" style:family="paragraph" style:parent-style-name="Standard">
      <style:paragraph-properties fo:line-height="115%" fo:text-align="justify" style:justify-single-word="false"/>
      <style:text-properties fo:font-size="12pt" officeooo:paragraph-rsid="001a050b" style:font-size-asian="12pt" style:font-size-complex="12pt"/>
    </style:style>
    <style:style style:name="P34" style:family="paragraph" style:parent-style-name="Standard">
      <style:paragraph-properties fo:line-height="115%" fo:text-align="justify" style:justify-single-word="false"/>
      <style:text-properties fo:color="#ff0000" loext:opacity="100%" fo:font-size="14pt" fo:font-weight="bold" officeooo:paragraph-rsid="001a050b" style:font-size-asian="14pt" style:font-weight-asian="bold" style:font-size-complex="14pt" style:font-weight-complex="bold"/>
    </style:style>
    <style:style style:name="P35" style:family="paragraph" style:parent-style-name="Standard">
      <style:paragraph-properties fo:line-height="115%" fo:text-align="justify" style:justify-single-word="false"/>
      <style:text-properties officeooo:paragraph-rsid="0026dc29"/>
    </style:style>
    <style:style style:name="P36" style:family="paragraph" style:parent-style-name="Standard">
      <style:paragraph-properties fo:line-height="115%" fo:text-align="justify" style:justify-single-word="false"/>
      <style:text-properties fo:font-size="12pt" officeooo:rsid="0026dc29" officeooo:paragraph-rsid="0026dc29" style:font-size-asian="12pt" style:font-size-complex="12pt"/>
    </style:style>
    <style:style style:name="P37" style:family="paragraph" style:parent-style-name="Standard">
      <style:paragraph-properties fo:line-height="115%" fo:text-align="justify" style:justify-single-word="false"/>
      <style:text-properties fo:font-size="12pt" officeooo:rsid="002b635c" officeooo:paragraph-rsid="002b635c" style:font-size-asian="12pt" style:font-size-complex="12pt"/>
    </style:style>
    <style:style style:name="P38" style:family="paragraph" style:parent-style-name="Standard">
      <style:paragraph-properties fo:margin-left="0in" fo:line-height="115%" fo:text-align="justify" style:justify-single-word="false" fo:text-indent="0in" style:auto-text-indent="false"/>
      <style:text-properties fo:color="#000000" loext:opacity="100%" officeooo:rsid="0018930a" officeooo:paragraph-rsid="0018930a"/>
    </style:style>
    <style:style style:name="P39" style:family="paragraph" style:parent-style-name="Standard">
      <style:paragraph-properties fo:margin-left="0in" fo:line-height="115%" fo:text-align="justify" style:justify-single-word="false" fo:text-indent="0in" style:auto-text-indent="false"/>
      <style:text-properties fo:color="#000000" loext:opacity="100%" officeooo:rsid="001a050b" officeooo:paragraph-rsid="001a050b"/>
    </style:style>
    <style:style style:name="P40" style:family="paragraph" style:parent-style-name="Heading_20_1">
      <style:paragraph-properties fo:text-align="left" style:justify-single-word="false"/>
      <style:text-properties fo:font-size="16pt" officeooo:rsid="001bd85e" officeooo:paragraph-rsid="001bd85e" style:font-size-asian="16pt" style:font-size-complex="16pt"/>
    </style:style>
    <style:style style:name="P41" style:family="paragraph" style:parent-style-name="Standard">
      <style:paragraph-properties fo:line-height="115%" fo:text-align="justify" style:justify-single-word="false" fo:text-indent="0.5in" style:auto-text-indent="false"/>
      <style:text-properties officeooo:paragraph-rsid="001fbd4d"/>
    </style:style>
    <style:style style:name="P42" style:family="paragraph" style:parent-style-name="Standard">
      <style:paragraph-properties fo:line-height="115%" fo:text-align="justify" style:justify-single-word="false" fo:text-indent="0.5in" style:auto-text-indent="false"/>
      <style:text-properties fo:color="#000000" loext:opacity="100%" fo:font-size="13pt" officeooo:paragraph-rsid="001fbd4d" fo:background-color="#ffffff" style:font-size-asian="13pt" style:font-size-complex="13pt"/>
    </style:style>
    <style:style style:name="P43" style:family="paragraph" style:parent-style-name="Standard">
      <style:paragraph-properties fo:margin-left="0in" fo:line-height="115%" fo:text-align="justify" style:justify-single-word="false" fo:text-indent="0in" style:auto-text-indent="false"/>
      <style:text-properties fo:color="#000000" loext:opacity="100%" fo:font-size="13pt" officeooo:rsid="00230be2" officeooo:paragraph-rsid="00230be2" fo:background-color="#ffffff" style:font-size-asian="13pt" style:font-size-complex="13pt"/>
    </style:style>
    <style:style style:name="P44" style:family="paragraph" style:parent-style-name="Standard">
      <style:paragraph-properties fo:margin-left="0in" fo:line-height="115%" fo:text-align="justify" style:justify-single-word="false" fo:text-indent="0in" style:auto-text-indent="false"/>
      <style:text-properties fo:color="#000000" loext:opacity="100%" fo:font-size="13pt" officeooo:rsid="0024dd85" officeooo:paragraph-rsid="0024dd85" fo:background-color="#ffffff" style:font-size-asian="13pt" style:font-size-complex="13pt"/>
    </style:style>
    <style:style style:name="P45" style:family="paragraph" style:parent-style-name="Heading_20_1">
      <style:paragraph-properties fo:text-align="left" style:justify-single-word="false"/>
      <style:text-properties fo:font-size="16pt" officeooo:paragraph-rsid="00224e5a" style:font-size-asian="16pt" style:font-size-complex="16pt"/>
    </style:style>
    <style:style style:name="P46" style:family="paragraph" style:parent-style-name="Standard">
      <style:paragraph-properties fo:line-height="115%" fo:text-align="justify" style:justify-single-word="false" fo:text-indent="0.5in" style:auto-text-indent="false"/>
      <style:text-properties fo:color="#000000" loext:opacity="100%" fo:font-size="13pt" officeooo:paragraph-rsid="0024dd85" style:font-size-asian="13pt" style:font-size-complex="13pt"/>
    </style:style>
    <style:style style:name="P47" style:family="paragraph" style:parent-style-name="Standard">
      <style:paragraph-properties fo:line-height="115%" fo:text-align="justify" style:justify-single-word="false" fo:text-indent="0.5in" style:auto-text-indent="false"/>
      <style:text-properties officeooo:paragraph-rsid="0024dd85"/>
    </style:style>
    <style:style style:name="P48" style:family="paragraph" style:parent-style-name="Standard">
      <style:paragraph-properties fo:margin-left="0in" fo:line-height="115%" fo:text-align="justify" style:justify-single-word="false" fo:text-indent="0in" style:auto-text-indent="false"/>
      <style:text-properties fo:color="#000000" loext:opacity="100%" fo:font-size="13pt" officeooo:paragraph-rsid="0024dd85" style:font-size-asian="13pt" style:font-size-complex="13pt"/>
    </style:style>
    <style:style style:name="P49" style:family="paragraph" style:parent-style-name="Standard">
      <style:paragraph-properties fo:margin-left="0in" fo:line-height="115%" fo:text-align="justify" style:justify-single-word="false" fo:text-indent="0in" style:auto-text-indent="false"/>
      <style:text-properties fo:color="#000000" loext:opacity="100%" fo:font-size="13pt" officeooo:rsid="0024dd85" officeooo:paragraph-rsid="0024dd85" style:font-size-asian="13pt" style:font-size-complex="13pt"/>
    </style:style>
    <style:style style:name="P50" style:family="paragraph" style:parent-style-name="Standard">
      <style:paragraph-properties fo:margin-left="0in" fo:line-height="115%" fo:text-align="justify" style:justify-single-word="false" fo:text-indent="0in" style:auto-text-indent="false"/>
      <style:text-properties fo:color="#ff0000" loext:opacity="100%" fo:font-size="13pt" fo:font-weight="bold" officeooo:paragraph-rsid="0024dd85" style:font-size-asian="13pt" style:font-weight-asian="bold" style:font-size-complex="13pt" style:font-weight-complex="bold"/>
    </style:style>
    <style:style style:name="P51" style:family="paragraph" style:parent-style-name="Standard">
      <style:paragraph-properties fo:margin-left="0in" fo:line-height="115%" fo:text-align="justify" style:justify-single-word="false" fo:text-indent="0in" style:auto-text-indent="false"/>
      <style:text-properties fo:color="#000000" loext:opacity="100%" fo:font-size="13pt" fo:font-weight="normal" officeooo:rsid="003a074d" officeooo:paragraph-rsid="003a074d" style:font-size-asian="13pt" style:font-weight-asian="normal" style:font-size-complex="13pt" style:font-weight-complex="normal"/>
    </style:style>
    <style:style style:name="P52" style:family="paragraph" style:parent-style-name="Standard" style:list-style-name="L3">
      <style:paragraph-properties fo:margin-left="0in" fo:line-height="115%" fo:text-align="justify" style:justify-single-word="false" fo:text-indent="0in" style:auto-text-indent="false"/>
      <style:text-properties officeooo:paragraph-rsid="003a074d"/>
    </style:style>
    <style:style style:name="P53" style:family="paragraph" style:parent-style-name="Standard" style:list-style-name="L3">
      <style:paragraph-properties fo:margin-left="0in" fo:line-height="115%" fo:text-align="justify" style:justify-single-word="false" fo:text-indent="0in" style:auto-text-indent="false"/>
      <style:text-properties officeooo:paragraph-rsid="0040c25d"/>
    </style:style>
    <style:style style:name="P54" style:family="paragraph" style:parent-style-name="Standard">
      <style:paragraph-properties fo:margin-left="0in" fo:line-height="115%" fo:text-align="justify" style:justify-single-word="false" fo:text-indent="0in" style:auto-text-indent="false"/>
      <style:text-properties officeooo:paragraph-rsid="003a074d"/>
    </style:style>
    <style:style style:name="P55" style:family="paragraph" style:parent-style-name="Heading_20_2" style:list-style-name="WWNum9">
      <style:paragraph-properties fo:margin-left="0in" fo:line-height="115%" fo:text-indent="0in" style:auto-text-indent="false"/>
      <style:text-properties officeooo:paragraph-rsid="00224e5a"/>
    </style:style>
    <style:style style:name="P56" style:family="paragraph" style:parent-style-name="Standard">
      <style:paragraph-properties fo:line-height="115%" fo:text-align="justify" style:justify-single-word="false" fo:text-indent="0.5in" style:auto-text-indent="false"/>
      <style:text-properties officeooo:paragraph-rsid="00224e5a"/>
    </style:style>
    <style:style style:name="P57" style:family="paragraph" style:parent-style-name="List_20_Paragraph" style:list-style-name="WWNum4">
      <style:paragraph-properties fo:line-height="115%" fo:text-align="justify" style:justify-single-word="false"/>
      <style:text-properties officeooo:paragraph-rsid="00224e5a"/>
    </style:style>
    <style:style style:name="P58" style:family="paragraph" style:parent-style-name="Standard">
      <style:paragraph-properties fo:margin-left="0.25in" fo:line-height="115%" fo:text-align="center" style:justify-single-word="false"/>
      <style:text-properties officeooo:paragraph-rsid="00224e5a"/>
    </style:style>
    <style:style style:name="P59" style:family="paragraph" style:parent-style-name="List_20_Paragraph" style:list-style-name="WWNum4">
      <style:paragraph-properties fo:line-height="115%"/>
      <style:text-properties officeooo:paragraph-rsid="00224e5a"/>
    </style:style>
    <style:style style:name="P60" style:family="paragraph" style:parent-style-name="Standard">
      <style:paragraph-properties fo:line-height="115%" fo:text-align="center" style:justify-single-word="false"/>
      <style:text-properties officeooo:paragraph-rsid="00224e5a"/>
    </style:style>
    <style:style style:name="P61" style:family="paragraph" style:parent-style-name="Standard">
      <style:paragraph-properties fo:line-height="115%" fo:text-align="justify" style:justify-single-word="false"/>
      <style:text-properties officeooo:paragraph-rsid="00224e5a"/>
    </style:style>
    <style:style style:name="P62" style:family="paragraph" style:parent-style-name="Standard">
      <style:paragraph-properties fo:line-height="115%" fo:text-align="justify" style:justify-single-word="false" fo:text-indent="0.5in" style:auto-text-indent="false"/>
      <style:text-properties fo:color="#000000" loext:opacity="100%" fo:font-size="13pt" officeooo:rsid="003fcac3" officeooo:paragraph-rsid="0024dd85" style:font-size-asian="13pt" style:font-size-complex="13pt"/>
    </style:style>
    <style:style style:name="P63" style:family="paragraph" style:parent-style-name="Heading_20_2" style:list-style-name="WWNum9">
      <style:paragraph-properties fo:margin-left="0.75in" fo:line-height="115%" fo:text-indent="-0.25in" style:auto-text-indent="false"/>
      <style:text-properties officeooo:paragraph-rsid="00224e5a"/>
    </style:style>
    <style:style style:name="P64" style:family="paragraph" style:parent-style-name="Standard">
      <style:paragraph-properties fo:line-height="115%" fo:text-align="justify" style:justify-single-word="false" fo:text-indent="0.5in" style:auto-text-indent="false"/>
      <style:text-properties fo:font-size="13pt" officeooo:paragraph-rsid="0024dd85" style:font-size-asian="13pt" style:font-size-complex="13pt"/>
    </style:style>
    <style:style style:name="P65" style:family="paragraph" style:parent-style-name="Standard" style:list-style-name="WWNum10">
      <style:paragraph-properties fo:line-height="115%" fo:text-align="justify" style:justify-single-word="false"/>
      <style:text-properties officeooo:paragraph-rsid="00224e5a"/>
    </style:style>
    <style:style style:name="P66" style:family="paragraph" style:parent-style-name="Standard">
      <style:paragraph-properties fo:line-height="115%" fo:text-align="justify" style:justify-single-word="false"/>
      <style:text-properties fo:color="#000000" loext:opacity="100%" fo:font-size="13pt" officeooo:paragraph-rsid="00224e5a" style:font-size-asian="13pt" style:font-size-complex="13pt"/>
    </style:style>
    <style:style style:name="P67" style:family="paragraph" style:parent-style-name="Standard">
      <style:paragraph-properties fo:line-height="115%" fo:text-align="justify" style:justify-single-word="false"/>
      <style:text-properties fo:color="#000000" loext:opacity="100%" fo:font-size="13pt" officeooo:rsid="0024dd85" officeooo:paragraph-rsid="0024dd85" style:font-size-asian="13pt" style:font-size-complex="13pt"/>
    </style:style>
    <style:style style:name="P68" style:family="paragraph" style:parent-style-name="Standard">
      <style:paragraph-properties fo:line-height="115%" fo:text-align="justify" style:justify-single-word="false"/>
      <style:text-properties fo:color="#000000" loext:opacity="100%" fo:font-size="13pt" officeooo:rsid="0024dd85" officeooo:paragraph-rsid="0025011e" style:font-size-asian="13pt" style:font-size-complex="13pt"/>
    </style:style>
    <style:style style:name="P69" style:family="paragraph" style:parent-style-name="Standard">
      <style:paragraph-properties fo:line-height="115%" fo:text-align="justify" style:justify-single-word="false"/>
      <style:text-properties fo:color="#000000" loext:opacity="100%" fo:font-size="13pt" officeooo:rsid="0025011e" officeooo:paragraph-rsid="0025011e" style:font-size-asian="13pt" style:font-size-complex="13pt"/>
    </style:style>
    <style:style style:name="T1" style:family="text">
      <style:text-properties fo:color="#000000" loext:opacity="100%" fo:font-family="'Times New Roman'" style:font-family-generic="roman" style:font-pitch="variable"/>
    </style:style>
    <style:style style:name="T2" style:family="text">
      <style:text-properties fo:color="#000000" loext:opacity="100%" fo:font-size="16pt" style:font-size-asian="16pt" style:font-size-complex="16pt"/>
    </style:style>
    <style:style style:name="T3" style:family="text">
      <style:text-properties fo:color="#000000" loext:opacity="100%" fo:font-size="13pt" style:text-underline-style="solid" style:text-underline-width="auto" style:text-underline-color="font-color" fo:font-weight="bold" style:font-size-asian="13pt" style:font-weight-asian="bold" style:font-size-complex="13pt" style:font-weight-complex="bold"/>
    </style:style>
    <style:style style:name="T4" style:family="text">
      <style:text-properties fo:color="#000000" loext:opacity="100%" fo:font-size="13pt" style:font-size-asian="13pt" style:font-size-complex="13pt"/>
    </style:style>
    <style:style style:name="T5" style:family="text">
      <style:text-properties officeooo:rsid="0012ed7d"/>
    </style:style>
    <style:style style:name="T6" style:family="text">
      <style:text-properties fo:color="#000000" loext:opacity="100%"/>
    </style:style>
    <style:style style:name="T7" style:family="text">
      <style:text-properties fo:color="#000000" loext:opacity="100%" fo:font-size="13pt" officeooo:rsid="0024dd85" style:font-size-asian="13pt" style:font-size-complex="13pt"/>
    </style:style>
    <style:style style:name="T8" style:family="text">
      <style:text-properties officeooo:rsid="0031755a"/>
    </style:style>
    <style:style style:name="T9" style:family="text">
      <style:text-properties officeooo:rsid="00141bde"/>
    </style:style>
    <style:style style:name="T10" style:family="text">
      <style:text-properties officeooo:rsid="00230be2"/>
    </style:style>
    <style:style style:name="T11" style:family="text">
      <style:text-properties officeooo:rsid="00301ff2"/>
    </style:style>
    <style:style style:name="T12" style:family="text">
      <style:text-properties fo:font-style="italic" officeooo:rsid="00141bde" style:font-style-asian="italic" style:font-style-complex="italic"/>
    </style:style>
    <style:style style:name="T13" style:family="text">
      <style:text-properties fo:font-weight="bold" officeooo:rsid="00141bde" style:font-weight-asian="bold" style:font-weight-complex="bold"/>
    </style:style>
    <style:style style:name="T14" style:family="text">
      <style:text-properties fo:font-weight="bold" style:font-weight-asian="bold" style:font-weight-complex="bold"/>
    </style:style>
    <style:style style:name="T15" style:family="text">
      <style:text-properties officeooo:rsid="002f9873"/>
    </style:style>
    <style:style style:name="T16" style:family="text">
      <style:text-properties officeooo:rsid="001812a3"/>
    </style:style>
    <style:style style:name="T17" style:family="text">
      <style:text-properties officeooo:rsid="001598e6"/>
    </style:style>
    <style:style style:name="T18" style:family="text">
      <style:text-properties officeooo:rsid="0015f57d"/>
    </style:style>
    <style:style style:name="T19" style:family="text">
      <style:text-properties fo:font-style="italic" style:font-style-asian="italic" style:font-style-complex="italic"/>
    </style:style>
    <style:style style:name="T20" style:family="text">
      <style:text-properties officeooo:rsid="0012192b"/>
    </style:style>
    <style:style style:name="T21" style:family="text">
      <style:text-properties officeooo:rsid="00458e96"/>
    </style:style>
    <style:style style:name="T22" style:family="text">
      <style:text-properties fo:color="#000000" loext:opacity="100%" fo:font-family="'Times New Roman'" style:font-family-generic="roman" style:font-pitch="variable" fo:font-weight="normal" style:font-weight-asian="normal" style:font-weight-complex="normal"/>
    </style:style>
    <style:style style:name="T23" style:family="text">
      <style:text-properties fo:color="#000000" loext:opacity="100%" fo:font-size="13pt" fo:font-weight="normal" officeooo:rsid="0012192b" style:font-size-asian="13pt" style:font-weight-asian="normal" style:font-size-complex="13pt" style:font-weight-complex="normal"/>
    </style:style>
    <style:style style:name="T24" style:family="text">
      <style:text-properties fo:color="#000000" loext:opacity="100%" fo:font-size="13pt" fo:font-weight="normal" officeooo:rsid="0012ed7d" style:font-size-asian="13pt" style:font-weight-asian="normal" style:font-size-complex="13pt" style:font-weight-complex="normal"/>
    </style:style>
    <style:style style:name="T25" style:family="text">
      <style:text-properties fo:color="#000000" loext:opacity="100%" fo:font-size="13pt" fo:font-weight="normal" officeooo:rsid="0015f57d" style:font-size-asian="13pt" style:font-weight-asian="normal" style:font-size-complex="13pt" style:font-weight-complex="normal"/>
    </style:style>
    <style:style style:name="T26" style:family="text">
      <style:text-properties fo:font-weight="bold" officeooo:rsid="0035422f" style:font-weight-asian="bold" style:font-weight-complex="bold"/>
    </style:style>
    <style:style style:name="T27" style:family="text">
      <style:text-properties officeooo:rsid="001bd85e"/>
    </style:style>
    <style:style style:name="T28" style:family="text">
      <style:text-properties officeooo:rsid="001d2ec4"/>
    </style:style>
    <style:style style:name="T29" style:family="text">
      <style:text-properties officeooo:rsid="002cc678"/>
    </style:style>
    <style:style style:name="T30" style:family="text">
      <style:text-properties officeooo:rsid="00175958"/>
    </style:style>
    <style:style style:name="T31" style:family="text">
      <style:text-properties fo:font-weight="normal" officeooo:rsid="00175958" style:font-weight-asian="normal" style:font-weight-complex="normal"/>
    </style:style>
    <style:style style:name="T32" style:family="text">
      <style:text-properties fo:color="#000000" loext:opacity="100%" fo:font-weight="normal" officeooo:rsid="00175958" style:font-weight-asian="normal" style:font-weight-complex="normal"/>
    </style:style>
    <style:style style:name="T33" style:family="text">
      <style:text-properties fo:color="#000000" loext:opacity="100%" fo:font-weight="bold" officeooo:rsid="00175958" style:font-weight-asian="bold" style:font-weight-complex="bold"/>
    </style:style>
    <style:style style:name="T34" style:family="text">
      <style:text-properties fo:color="#000000" loext:opacity="100%" fo:font-weight="bold" officeooo:rsid="001812a3" style:font-weight-asian="bold" style:font-weight-complex="bold"/>
    </style:style>
    <style:style style:name="T35" style:family="text">
      <style:text-properties officeooo:rsid="0035422f"/>
    </style:style>
    <style:style style:name="T36" style:family="text">
      <style:text-properties officeooo:rsid="0035cec6"/>
    </style:style>
    <style:style style:name="T37" style:family="text">
      <style:text-properties officeooo:rsid="00378daa"/>
    </style:style>
    <style:style style:name="T38" style:family="text">
      <style:text-properties fo:font-weight="bold" officeooo:rsid="00378daa" style:font-weight-asian="bold" style:font-weight-complex="bold"/>
    </style:style>
    <style:style style:name="T39" style:family="text">
      <style:text-properties fo:font-weight="bold" officeooo:rsid="00458e96" style:font-weight-asian="bold" style:font-weight-complex="bold"/>
    </style:style>
    <style:style style:name="T40" style:family="text">
      <style:text-properties fo:font-weight="bold" officeooo:rsid="00382260" style:font-weight-asian="bold" style:font-weight-complex="bold"/>
    </style:style>
    <style:style style:name="T41" style:family="text">
      <style:text-properties officeooo:rsid="0044b08a"/>
    </style:style>
    <style:style style:name="T42" style:family="text">
      <style:text-properties fo:font-style="italic" style:text-underline-style="solid" style:text-underline-width="auto" style:text-underline-color="font-color" officeooo:rsid="00458e96" style:font-style-asian="italic" style:font-style-complex="italic"/>
    </style:style>
    <style:style style:name="T43" style:family="text">
      <style:text-properties officeooo:rsid="0046cc9b"/>
    </style:style>
    <style:style style:name="T44" style:family="text">
      <style:text-properties fo:font-size="13pt" style:font-size-asian="13pt" style:font-size-complex="13pt"/>
    </style:style>
    <style:style style:name="T45" style:family="text">
      <style:text-properties fo:background-color="transparent" loext:char-shading-value="0"/>
    </style:style>
    <style:style style:name="T46" style:family="text">
      <style:text-properties fo:color="#000000" loext:opacity="100%" fo:font-style="italic" style:font-style-asian="italic" style:font-style-complex="italic"/>
    </style:style>
    <style:style style:name="T47" style:family="text">
      <style:text-properties fo:color="#000000" loext:opacity="100%" officeooo:rsid="0018930a"/>
    </style:style>
    <style:style style:name="T48" style:family="text">
      <style:text-properties fo:color="#000000" loext:opacity="100%" officeooo:rsid="0024dd85"/>
    </style:style>
    <style:style style:name="T49" style:family="text">
      <style:text-properties fo:color="#000000" loext:opacity="100%" fo:font-style="italic" fo:font-weight="bold" style:font-style-asian="italic" style:font-weight-asian="bold" style:font-style-complex="italic" style:font-weight-complex="bold"/>
    </style:style>
    <style:style style:name="T50" style:family="text">
      <style:text-properties fo:color="#000000" loext:opacity="100%" fo:font-weight="bold" style:font-weight-asian="bold" style:font-weight-complex="bold"/>
    </style:style>
    <style:style style:name="T51" style:family="text">
      <style:text-properties officeooo:rsid="0024dd85"/>
    </style:style>
    <style:style style:name="T52" style:family="text">
      <style:text-properties officeooo:rsid="001a050b"/>
    </style:style>
    <style:style style:name="T53" style:family="text">
      <style:text-properties fo:font-size="12pt" officeooo:rsid="0020850e" style:font-size-asian="12pt" style:font-size-complex="12pt"/>
    </style:style>
    <style:style style:name="T54" style:family="text">
      <style:text-properties officeooo:rsid="002844cb"/>
    </style:style>
    <style:style style:name="T55" style:family="text">
      <style:text-properties officeooo:rsid="002b635c"/>
    </style:style>
    <style:style style:name="T56" style:family="text">
      <style:text-properties officeooo:rsid="00382260"/>
    </style:style>
    <style:style style:name="T57" style:family="text">
      <style:text-properties officeooo:rsid="002e60cd"/>
    </style:style>
    <style:style style:name="T58" style:family="text">
      <style:text-properties fo:color="#000000" loext:opacity="100%" fo:font-size="13pt" style:font-size-asian="13pt"/>
    </style:style>
    <style:style style:name="T59" style:family="text">
      <style:text-properties fo:color="#000000" loext:opacity="100%" fo:font-size="13pt" officeooo:rsid="0024dd85" style:font-size-asian="13pt"/>
    </style:style>
    <style:style style:name="T60" style:family="text">
      <style:text-properties fo:color="#000000" loext:opacity="100%" fo:font-family="'Times New Roman'" style:font-family-generic="roman" style:font-pitch="variable" fo:font-size="13pt" style:font-size-asian="13pt" style:font-size-complex="13pt"/>
    </style:style>
    <style:style style:name="T61" style:family="text">
      <style:text-properties fo:color="#000000" loext:opacity="100%" fo:font-size="13pt" fo:background-color="#ffffff" loext:char-shading-value="0" style:font-size-asian="13pt" style:font-size-complex="13pt"/>
    </style:style>
    <style:style style:name="T62" style:family="text">
      <style:text-properties fo:color="#000000" loext:opacity="100%" fo:font-size="13pt" style:font-size-asian="11.3500003814697pt" style:font-size-complex="13pt"/>
    </style:style>
    <style:style style:name="T63" style:family="text">
      <style:text-properties officeooo:rsid="003fcac3"/>
    </style:style>
    <style:style style:name="T64" style:family="text">
      <style:text-properties officeooo:rsid="003f1ef3"/>
    </style:style>
    <style:style style:name="T65" style:family="text">
      <style:text-properties fo:font-size="12pt" style:font-size-asian="12pt" style:font-size-complex="12pt"/>
    </style:style>
    <style:style style:name="T66" style:family="text">
      <style:text-properties fo:font-size="12pt" officeooo:rsid="003b181b" style:font-size-asian="12pt" style:font-size-complex="12pt"/>
    </style:style>
    <style:style style:name="T67" style:family="text">
      <style:text-properties fo:font-size="12pt" officeooo:rsid="00444888" style:font-size-asian="12pt" style:font-size-complex="12pt"/>
    </style:style>
    <style:style style:name="T68" style:family="text">
      <style:text-properties fo:color="#000000" loext:opacity="100%" fo:font-size="13pt" fo:font-weight="normal" officeooo:rsid="003a074d" style:font-size-asian="13pt" style:font-weight-asian="normal" style:font-size-complex="13pt" style:font-weight-complex="normal"/>
    </style:style>
    <style:style style:name="T69" style:family="text">
      <style:text-properties fo:color="#000000" loext:opacity="100%" fo:font-size="12pt" fo:font-weight="normal" officeooo:rsid="0020850e" style:font-size-asian="12pt" style:font-weight-asian="normal" style:font-size-complex="12pt" style:font-weight-complex="normal"/>
    </style:style>
    <style:style style:name="T70" style:family="text">
      <style:text-properties fo:color="#000000" loext:opacity="100%" fo:font-size="12pt" fo:font-weight="normal" officeooo:rsid="003a074d" style:font-size-asian="12pt" style:font-weight-asian="normal" style:font-size-complex="12pt" style:font-weight-complex="normal"/>
    </style:style>
    <style:style style:name="T71" style:family="text">
      <style:text-properties fo:color="#000000" loext:opacity="100%" fo:font-size="12pt" fo:font-weight="normal" officeooo:rsid="003f1ef3" style:font-size-asian="12pt" style:font-weight-asian="normal" style:font-size-complex="12pt" style:font-weight-complex="normal"/>
    </style:style>
    <style:style style:name="T72" style:family="text">
      <style:text-properties fo:color="#000000" loext:opacity="100%" fo:font-size="12pt" fo:font-weight="normal" officeooo:rsid="00208d91" style:font-size-asian="12pt" style:font-weight-asian="normal" style:font-size-complex="12pt" style:font-weight-complex="normal"/>
    </style:style>
    <style:style style:name="T73" style:family="text">
      <style:text-properties fo:color="#000000" loext:opacity="100%" fo:font-size="12pt" fo:font-weight="normal" officeooo:rsid="00424b6f" style:font-size-asian="12pt" style:font-weight-asian="normal" style:font-size-complex="12pt" style:font-weight-complex="normal"/>
    </style:style>
    <style:style style:name="T74" style:family="text">
      <style:text-properties fo:color="#000000" loext:opacity="100%" fo:font-size="12pt" fo:font-weight="normal" officeooo:rsid="00444888" style:font-size-asian="12pt" style:font-weight-asian="normal" style:font-size-complex="12pt" style:font-weight-complex="normal"/>
    </style:style>
    <style:style style:name="T75" style:family="text">
      <style:text-properties fo:color="#000000" loext:opacity="100%" officeooo:rsid="003e4961"/>
    </style:style>
    <style:style style:name="T76" style:family="text">
      <style:text-properties fo:color="#000000" loext:opacity="100%" fo:font-size="13pt" officeooo:rsid="0025011e" style:font-size-asian="13pt" style:font-size-complex="13pt"/>
    </style:style>
    <style:style style:name="T77" style:family="text">
      <style:text-properties fo:color="#000000" loext:opacity="100%" fo:font-size="13pt" fo:font-style="italic" style:font-size-asian="13pt" style:font-style-asian="italic" style:font-size-complex="13pt" style:font-style-complex="italic"/>
    </style:style>
    <style:style style:name="T78" style:family="text">
      <style:text-properties fo:color="#000000" loext:opacity="100%" fo:font-size="13pt" fo:language="it" fo:country="IT" style:font-size-asian="13pt" style:font-size-complex="13pt"/>
    </style:style>
    <style:style style:name="T79" style:family="text">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T80" style:family="text">
      <style:text-properties fo:color="#000000" loext:opacity="100%" fo:font-size="13pt" fo:font-weight="bold" style:font-size-asian="13pt" style:font-weight-asian="bold" style:font-size-complex="13pt" style:font-weight-complex="bold"/>
    </style:style>
    <style:style style:name="T81" style:family="text">
      <style:text-properties fo:color="#000000" loext:opacity="100%" style:text-position="sub 58%" fo:font-size="13pt" fo:language="it" fo:country="IT" fo:font-style="italic" style:font-size-asian="13pt" style:font-style-asian="italic" style:font-size-complex="13pt" style:font-style-complex="italic"/>
    </style:style>
    <style:style style:name="T82" style:family="text">
      <style:text-properties fo:color="#000000" loext:opacity="100%" style:text-position="super 58%" fo:font-size="13pt" fo:language="it" fo:country="IT" style:font-size-asian="13pt" style:font-size-complex="13pt"/>
    </style:style>
    <style:style style:name="T83" style:family="text">
      <style:text-properties fo:color="#000000" loext:opacity="100%" fo:font-size="13pt" fo:language="it" fo:country="IT" fo:font-style="italic" style:font-size-asian="13pt" style:font-style-asian="italic" style:font-size-complex="13pt" style:font-style-complex="italic"/>
    </style:style>
    <style:style style:name="T84" style:family="text">
      <style:text-properties fo:color="#000000" loext:opacity="100%" fo:background-color="#ffffff" loext:char-shading-value="0"/>
    </style:style>
    <style:style style:name="T85" style:family="text">
      <style:text-properties fo:color="#000000" loext:opacity="100%" fo:font-size="13pt" fo:language="it" fo:country="IT" officeooo:rsid="0025011e" style:font-size-asian="13pt" style:font-size-complex="13pt"/>
    </style:style>
    <style:style style:name="T86" style:family="text">
      <style:text-properties fo:color="#000000" loext:opacity="100%" fo:font-size="12pt" style:font-size-asian="12pt" style:font-size-complex="13pt"/>
    </style:style>
    <style:style style:name="T87" style:family="text">
      <style:text-properties officeooo:rsid="0025011e"/>
    </style:style>
    <style:style style:name="T88" style:family="text">
      <style:text-properties style:font-family-asian="'Times New Roman'" style:font-family-generic-asian="system" style:font-pitch-asian="variable" style:font-family-complex="'Times New Roman'" style:font-family-generic-complex="system" style:font-pitch-complex="variable" style:font-weight-complex="bold"/>
    </style:style>
    <style:style style:name="T89" style:family="text">
      <style:text-properties fo:language="en" fo:country="US" style:font-family-asian="'Times New Roman'" style:font-family-generic-asian="system" style:font-pitch-asian="variable" style:font-family-complex="'Times New Roman'" style:font-family-generic-complex="system" style:font-pitch-complex="variable" style:font-weight-complex="bold"/>
    </style:style>
    <style:style style:name="T90" style:family="text">
      <style:text-properties fo:color="#000000" loext:opacity="100%" fo:language="en" fo:country="US" style:font-family-asian="'Times New Roman'" style:font-family-generic-asian="system" style:font-pitch-asian="variable" style:font-family-complex="'Times New Roman'" style:font-family-generic-complex="system" style:font-pitch-complex="variable" style:font-weight-complex="bold"/>
    </style:style>
    <style:style style:name="T91" style:family="text">
      <style:text-properties fo:language="en" fo:country="US" officeooo:rsid="0025011e" style:font-family-asian="'Times New Roman'" style:font-family-generic-asian="system" style:font-pitch-asian="variable" style:font-family-complex="'Times New Roman'" style:font-family-generic-complex="system" style:font-pitch-complex="variable" style:font-weight-complex="bold"/>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2874in, 0.3193in, 0.9429in, 0.228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Apto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Apto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Apto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Apto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Apto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Apto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Apto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Apto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Apto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Apto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 loext:marker-style-name="T1"><text:bookmark-start text:name="__RefHeading___Toc3431_1102695421"/><text:bookmark-start text:name="_Toc223508757"/><text:span text:style-name="T2">Mục tiêu của đề tài</text:span><text:bookmark-end text:name="__RefHeading___Toc3431_1102695421"/><text:bookmark-end text:name="_Toc223508757"/></text:h>
      <text:list text:style-name="WWNum7">
        <text:list-item>
          <text:p text:style-name="P2" loext:marker-style-name="T1"><text:span text:style-name="T3">Mục tiêu chung</text:span><text:span text:style-name="T4">: Xây dựng mô hình học máy hỗ trợ chẩn đoán ung thư đại trực tràng </text:span></text:p>
        </text:list-item>
        <text:list-item>
          <text:p text:style-name="P2" loext:marker-style-name="T1"><text:span text:style-name="T3">Đối tượng nghiên cứu</text:span><text:span text:style-name="T4">: Các miRNA được tách chiết từ huyết tương sau khi phân lập từ máu ngoại vi của các bệnh nhân.</text:span></text:p>
        </text:list-item>
        <text:list-item>
          <text:p text:style-name="P2" loext:marker-style-name="T1"><text:span text:style-name="T3">Mục tiêu cụ thể:</text:span></text:p>
        </text:list-item>
      </text:list>
      <text:list xml:id="list1012208588" text:style-name="WWNum4">
        <text:list-item>
          <text:p text:style-name="P3" loext:marker-style-name="T1"><text:span text:style-name="T4">Xác định các miRNA tiềm năng trong chẩn đoán ung thư đại trực tràng.</text:span></text:p>
        </text:list-item>
        <text:list-item>
          <text:p text:style-name="P3" loext:marker-style-name="T1"><text:span text:style-name="T4">Xây dựng mô hình học máy hỗ trợ chẩn đoán các ung thư đại trực tràng.</text:span></text:p>
        </text:list-item>
        <text:list-item>
          <text:p text:style-name="P4" loext:marker-style-name="T1">Xác định các tương tác miRNA-mRNA và các con đường sinh học liên quan đến các miRNA trong mô hình học máy.</text:p>
        </text:list-item>
      </text:list>
      <text:p text:style-name="P5" loext:marker-style-name="T1"><draw:frame draw:style-name="fr1" draw:name="Image1" text:anchor-type="char" svg:x="-0.0374in" svg:y="0.1984in" svg:width="6.9902in" svg:height="3.6846in" draw:z-index="8"><draw:image xlink:href="Pictures/10000000000007800000043879DA9A87.png" xlink:type="simple" xlink:show="embed" xlink:actuate="onLoad" draw:mime-type="image/png"/></draw:frame><text:span text:style-name="T5">Hình 1: </text:span>Quy trình thực hiện nội dung đề tài</text:p>
      <text:p text:style-name="P6"/>
      <text:h text:style-name="P7" text:outline-level="1">Thu nhập, xử lý thông tin lâm sàng và preprocess-normalization các database GEO:</text:h>
      <text:p text:style-name="P8"><text:span text:style-name="T4">Thu thập dữ liệu về mức độ biểu hiện của miRNA và thông tin lâm sàng của bệnh nhân ung thư đại trực tràng từ cơ sở dữ liệu Gene Expression Omnibus – GEO (</text:span><text:a xlink:type="simple" xlink:href="https://www.ncbi.nlm.nih.gov/geo/" text:style-name="Internet_20_link" text:visited-style-name="Visited_20_Internet_20_Link"><text:span text:style-name="Internet_20_link"><text:span text:style-name="T4">https://www.ncbi.nlm.nih.gov/geo/</text:span></text:span></text:a><text:span text:style-name="T4">). Từ khóa được dùng để tìm kiếm các cơ sở dữ liệu gồm: "miRNA" AND “Homo sapiens” AND "Colorectal cancer" AND "blood" OR “plasma” OR “serum”.</text:span></text:p>
      <text:p text:style-name="P9" loext:marker-style-name="T1"><text:span text:style-name="T4">Các dữ liệu được thu nhận để đưa vào quy trình xử lý cần có các tiêu chí sau:</text:span></text:p>
      <text:list text:continue-numbering="true" text:style-name="WWNum4">
        <text:list-item>
          <text:p text:style-name="P10" loext:marker-style-name="T1"><text:span text:style-name="T4">Dữ liệu thực nghiệm trên mẫu máu ngoại vi ở người.</text:span></text:p>
        </text:list-item>
        <text:list-item>
          <text:p text:style-name="P10" loext:marker-style-name="T1"><text:span text:style-name="T4">Tệp dữ liệu chứa cả số lượng mẫu bệnh ung thư (có chứa mẫu ung thư đại trực tràng) và mẫu không ung thư.</text:span></text:p>
        </text:list-item>
        <text:list-item>
          <text:p text:style-name="P10" loext:marker-style-name="T1"><text:soft-page-break/><text:span text:style-name="T4">Các tập dữ liệu thu nhận có ít nhất từ 40 mẫu ở mỗi phân loại nhóm mẫu.</text:span></text:p>
        </text:list-item>
        <text:list-item>
          <text:p text:style-name="P10" loext:marker-style-name="T1"><text:span text:style-name="T4">Ưu tiên các tập dữ liệu thực hiện đánh giá trên quần thể Á Đông (Nhật Bản, Hàn Quốc, Trung Quốc, Đài Loan) vì có sự tương đồng về di truyền và lối sống với người Việt Nam </text:span></text:p>
        </text:list-item>
      </text:list>
      <text:p text:style-name="P11" loext:marker-style-name="T1"><text:span text:style-name="T4">Các dữ liệu bị loại trừ trong quá trình thu nhận dữ liệu:</text:span></text:p>
      <text:list xml:id="list12538174503685" text:continue-numbering="true" text:style-name="WWNum4">
        <text:list-item>
          <text:p text:style-name="P10" loext:marker-style-name="T1"><text:span text:style-name="T4">Không lấy dữ liệu đánh giá trên mẫu mô, các nhóm bệnh ung thư khác hoặc di căn từ cơ quan khác.</text:span></text:p>
        </text:list-item>
        <text:list-item>
          <text:p text:style-name="P10" loext:marker-style-name="T1"><text:span text:style-name="T4">Không thu nhận dữ liệu đánh giá trên động vật, tế bào ung thư.</text:span></text:p>
        </text:list-item>
        <text:list-item>
          <text:p text:style-name="P10" loext:marker-style-name="T1">Không lấy dữ liệu giải mẫu bộ gen DNA.</text:p>
        </text:list-item>
      </text:list>
      <text:p text:style-name="P12" loext:marker-style-name="T1"/>
      <text:list xml:id="list3191570299" text:style-name="WWNum9">
        <text:list-item>
          <text:list>
            <text:list-header>
              <text:h text:style-name="P13" text:outline-level="2" loext:marker-style-name="T1"><text:bookmark-start text:name="_Toc223508761"/><text:bookmark-start text:name="__RefHeading___Toc3437_1102695421"/><text:span text:style-name="T6">Tiền xử lý và chuẩn hóa dữ liệu</text:span><text:bookmark-end text:name="_Toc223508761"/><text:bookmark-end text:name="__RefHeading___Toc3437_1102695421"/></text:h>
            </text:list-header>
          </text:list>
        </text:list-item>
      </text:list>
      <text:p text:style-name="P14" loext:marker-style-name="T1"><text:span text:style-name="T4">Các bộ dữ liệu thu nhận sử dụng các công nghệ khác nhau để phân tích nên cần phải loại bỏ các mẫu bị lặp, chuyển đổi tín hiệu từ probe ID sang gene symbol dựa vào file platform annotation. Mẫu trong các tệp dữ liệu được phân loại thành nhóm không ung thư/khỏe mạnh (no-cancer/healthy) và các nhóm của các loại ung thư khác nhau. Sau đó, các tập dữ liệu sẽ được chuẩn hóa (Normalization) bằng cách sử dụng hàm "normalizeBetweenArrays" trong gói phần mềm R “limma”. Các tập dữ liệu GSE sau khi chuẩn hóa sẽ được gộp lại và thực hiện loại bỏ hiệu ứng theo lô (Batch effect) bằng cách sử dụng gói “sva” (v3.5.0) để chia thành 2 nhóm dữ liệu tập huấn (training) và kiểm tra (testing) theo tỷ lệ 70:30 để đảm bảo đánh giá tính tổng quá hóa của mô hình </text:span><text:bookmark-start text:name="ZOTERO_BREF_GRciRzo73W4p"/><text:span text:style-name="T4">[</text:span><text:span text:style-name="T7">1</text:span><text:span text:style-name="T4">]</text:span><text:bookmark-end text:name="ZOTERO_BREF_GRciRzo73W4p"/><text:span text:style-name="T4">.</text:span><text:span text:style-name="T6"> Nhóm dữ liệu training</text:span><text:span text:style-name="T4"> giúp xác định các dấu ấn sinh học chẩn đoán tiềm năng, trong khi nhóm dữ liệu testing dùng để xác nhận kết quả phân tích.</text:span></text:p>
      <text:p text:style-name="P15" loext:marker-style-name="T1">Reference paper: [1] Joseph, V.R.: Optimal ratio for data splitting. Statistical Analysis and Data Mining: The ASA Data Science Journal. 15, 531–538 (2022). <text:a xlink:type="simple" xlink:href="https://doi.org/10.1002/sam.11583" text:style-name="Internet_20_link" text:visited-style-name="Visited_20_Internet_20_Link">https://doi.org/10.1002/sam.11583</text:a> </text:p>
      <text:p text:style-name="P16" loext:marker-style-name="T1"><text:s/></text:p>
      <text:p text:style-name="P17" loext:marker-style-name="T1">→ <text:span text:style-name="T8">Loại data em download từ GEO để chạy code là file SOFT (Simple Omnibus Format in Text). Đây là </text:span><text:span text:style-name="T9">thông tin </text:span><text:span text:style-name="T8">lâm sàng của</text:span><text:span text:style-name="T9"> các tập GSE </text:span><text:span text:style-name="T8">mà </text:span><text:span text:style-name="T10">em </text:span><text:span text:style-name="T8">quan tâm và</text:span><text:span text:style-name="T10"> đã </text:span><text:span text:style-name="T8">sử dụng để thực hiện preprocess</text:span><text:span text:style-name="T9">:</text:span></text:p>
      <text:list xml:id="list201329362" text:style-name="WWNum1">
        <text:list-item>
          <text:p text:style-name="P18">GSE113486: no-cancer control = 100 samples; CRC=40 samples<text:line-break/><text:span text:style-name="T11">link GEO: </text:span><text:a xlink:type="simple" xlink:href="https://www.ncbi.nlm.nih.gov/geo/query/acc.cgi?acc=GSE113486" text:style-name="Internet_20_link" text:visited-style-name="Visited_20_Internet_20_Link"><text:span text:style-name="T11">https://www.ncbi.nlm.nih.gov/geo/query/acc.cgi?acc=GSE113486</text:span></text:a><text:span text:style-name="T11"> </text:span></text:p>
        </text:list-item>
        <text:list-item>
          <text:p text:style-name="P18">GSE211692: no-cancer control = 5643 samples; CRC = 1596 samples<text:line-break/><text:span text:style-name="T11">link GEO: </text:span><text:a xlink:type="simple" xlink:href="https://www.ncbi.nlm.nih.gov/geo/query/acc.cgi?acc=GSE211692" text:style-name="Internet_20_link" text:visited-style-name="Visited_20_Internet_20_Link"><text:span text:style-name="T11">https://www.ncbi.nlm.nih.gov/geo/query/acc.cgi?acc=GSE211692</text:span></text:a><text:span text:style-name="T11"> </text:span></text:p>
        </text:list-item>
        <text:list-item>
          <text:p text:style-name="P18">GSE106817: no-cancer control = 2759 samples; CRC = 115 samples <text:line-break/><text:span text:style-name="T11">link GEO: </text:span><text:a xlink:type="simple" xlink:href="https://www.ncbi.nlm.nih.gov/geo/query/acc.cgi?acc=GSE106817" text:style-name="Internet_20_link" text:visited-style-name="Visited_20_Internet_20_Link"><text:span text:style-name="T11">https://www.ncbi.nlm.nih.gov/geo/query/acc.cgi?acc=GSE106817</text:span></text:a><text:span text:style-name="T11"> </text:span></text:p>
        </text:list-item>
      </text:list>
      <text:list text:style-name="L1">
        <text:list-item>
          <text:p text:style-name="P19"><text:span text:style-name="T9">Cả 3 GSE trên đều thực hiện trên mẫu serum của người Nhật và cùng 1 platform </text:span><text:span text:style-name="T12">GPL21263 - 3D-Gene Human miRNA V21_1.0.0</text:span><text:span text:style-name="T9">.</text:span> Các tập dữ liệu GSE sau khi chuẩn hóa <text:span text:style-name="T9">(</text:span><text:span text:style-name="T13">Normalization</text:span><text:span text:style-name="T9">)</text:span> sẽ được gộp lại và thực hiện <text:span text:style-name="T14">Batch effect</text:span> bằng cách sử dụng gói “sva” (v3.5.0) để chia thành 2 <text:span text:style-name="T15">tapaj</text:span> dữ liệu tập huấn (<text:span text:style-name="T14">training</text:span>) và kiểm tra (<text:span text:style-name="T14">testing</text:span>) theo tỷ lệ 70:30 để đảm bảo đánh giá tính tổng quá hóa của mô hình</text:p>
        </text:list-item>
        <text:list-item>
          <text:p text:style-name="P20">sau khi gộp và batch effect thì chi<text:span text:style-name="T16">a</text:span> ra trainig: <text:span text:style-name="T11">testing (</text:span>internal validation<text:span text:style-name="T11">)</text:span>= 70:30 <text:line-break/><text:tab/>Tập Train: (7177, 2565) | Tập Test: (3076, 2565)</text:p>
        </text:list-item>
        <text:list-item>
          <text:p text:style-name="P21"><text:soft-page-break/>Tập dữ liệu <text:span text:style-name="T14">external validation</text:span> em preprocess, <text:span text:style-name="T17">normalization</text:span> và gộp 2 tập GSE dưới đây cũng thực hiện trên mẫu serum người <text:span text:style-name="T18">Nhật</text:span> và cùng platform <text:span text:style-name="T19">GPL21263 - 3D-Gene Human miRNA V21_1.0.0:</text:span></text:p>
        </text:list-item>
      </text:list>
      <text:list text:continue-list="list201329362" text:style-name="WWNum1">
        <text:list-item>
          <text:p text:style-name="P18">GSE113740: no-cancer control = 969 samples; CRC = 25 samples <text:line-break/><text:span text:style-name="T11">link GEO: </text:span><text:a xlink:type="simple" xlink:href="https://www.ncbi.nlm.nih.gov/geo/query/acc.cgi?acc=GSE113740" text:style-name="Internet_20_link" text:visited-style-name="Visited_20_Internet_20_Link"><text:span text:style-name="T11">https://www.ncbi.nlm.nih.gov/geo/query/acc.cgi?acc=GSE113740</text:span></text:a><text:span text:style-name="T11"> </text:span></text:p>
        </text:list-item>
        <text:list-item>
          <text:p text:style-name="P18">GSE112264: no-cancer control = 41 samples; CRC = 50 samples<text:line-break/><text:span text:style-name="T11">link GEO: </text:span><text:a xlink:type="simple" xlink:href="https://www.ncbi.nlm.nih.gov/geo/query/acc.cgi?acc=GSE112264" text:style-name="Internet_20_link" text:visited-style-name="Visited_20_Internet_20_Link"><text:span text:style-name="T11">https://www.ncbi.nlm.nih.gov/geo/query/acc.cgi?acc=GSE112264</text:span></text:a><text:span text:style-name="T11"> </text:span></text:p>
        </text:list-item>
      </text:list>
      <text:p text:style-name="P22" loext:marker-style-name="T1">→ <text:span text:style-name="T20">thắc mắc việc chia các tập dữ liệu training-validation-testing </text:span><text:span text:style-name="T21">và thông tin lâm sàng của các sample được sử dụng</text:span><text:span text:style-name="T20">:</text:span></text:p>
      <text:p text:style-name="P23" loext:marker-style-name="T22"><text:span text:style-name="T23">workflow thực hiện </text:span><text:span text:style-name="T24">ở hình 1 em đã được thầy hướng dẫn chỉnh sửa và đồng ý. Tuy nhiên, trong quá trình tìm hiểu và xử lý dữ liệu ra được các miRNA tiềm năng thì </text:span><text:span text:style-name="T25">em vẫn có những khúc mắc về</text:span><text:span text:style-name="T24"> </text:span><text:span text:style-name="T25">cách </text:span>chia tập dữ liệu (Data Splitting Strategy)<text:span text:style-name="T25">:</text:span></text:p>
      <text:list text:style-name="L2">
        <text:list-item>
          <text:p text:style-name="P24"><text:span text:style-name="T14">Em đánh giá final model trên tập external validation độc lập như vậy thì cách làm này có tránh bị data leakage </text:span><text:span text:style-name="T26">không</text:span><text:span text:style-name="T14"> và đánh giá đúng được khả năng học+phân loại của model không ạ?</text:span><text:line-break/><text:span text:style-name="T27">Vì khi lựa database độc lập để external validation như vậy thì số samples </text:span><text:span text:style-name="T28">của tập data được gộp em đang thấy không có cơ sở lựa chọn phù hợp so </text:span><text:span text:style-name="T27">với 2 tập training-testing </text:span><text:span text:style-name="T28">để đánh giá </text:span><text:span text:style-name="T29">final </text:span><text:span text:style-name="T28">model</text:span></text:p>
        </text:list-item>
        <text:list-item>
          <text:p text:style-name="P25">Em tìm hiểu thì có thấy việc chia training-validation-testing từ 1 full database đã gộp và xử lý batch effect thì em nên thay đổi cách chia dữ liệu sau khi preprocess các GSE hay ở bước nào em thực hiện chia tập cho hợp lý ạ?</text:p>
        </text:list-item>
        <text:list-item>
          <text:p text:style-name="P26"><text:span text:style-name="T29">H</text:span><text:span text:style-name="T30">iện tại pipline code em chạy ra đang thực hiện huấn luyện và đánh giá model trên serum của người Nhật, nhưng nếu em lựa chọn database của quần thể dân tộc khác </text:span><text:span text:style-name="T29">với platform khác</text:span><text:span text:style-name="T30"> </text:span><text:span text:style-name="T16">để làm external validation</text:span><text:span text:style-name="T30"> thì</text:span><text:span text:style-name="T31"> </text:span><text:span text:style-name="T32">nó </text:span><text:span text:style-name="T33">có thực sự đánh giá khả năng phân loại của model </text:span><text:span text:style-name="T34">trên data của nhiều hơn 2 quần thể người khác nhau không ạ?</text:span><text:span text:style-name="T16"> <text:tab/><text:tab/>(do đây cũng là câu hỏi em đã từng nhận được từ hội đồng rằng nếu ứng dụng model đã xây dựng để ứng dụng cho bệnh nhân người Việt thì Cơ sở lý luận cho việc sử dụng dữ liệu nghiên cứu quốc tế để lựa chọn biomarker miRNA cho việc sàng lọc trên quần thể người Việt Nam?)</text:span></text:p>
        </text:list-item>
        <text:list-item>
          <text:p text:style-name="P27"><text:span text:style-name="T35">Cuối tháng 6/2026, thầy hướng </text:span><text:span text:style-name="T36">dẫn có định hướng cho em</text:span> preprocess database của miRNA trên <text:span text:style-name="T36">mẫu </text:span>mô (tissue) (trên cơ sở TCGA hoặc GEO hoặc cBioPortal) với thông tin lâm sàng là survival hoặc về treatment và sau đó so sánh tìm các miRNA giao thoa <text:span text:style-name="T36">với</text:span> bộ data <text:span text:style-name="T36">circulating miRNA</text:span> trên <text:span text:style-name="T36">mẫu máu ngoại vi</text:span> <text:span text:style-name="T36">(</text:span>blood/serum/plasma<text:span text:style-name="T36">) </text:span><text:span text:style-name="T37">ở bước DE-feature selection</text:span><text:span text:style-name="T36"> rồi mới đưa vào chạy model để cuối cùng có thể kết luận các miRNA </text:span><text:span text:style-name="T37">tiềm năng được chọn</text:span><text:span text:style-name="T36"> không những có sự khác biệt giữa CRC-no cancer mà còn có thể đánh giá khả năng tiên lượng, vì thầy thấy nếu chỉ làm circulation miRNA trong hệ máu ngoại vi thì vẫn cần thực nghiệm để đánh giá. Tuy nhiên, </text:span><text:span text:style-name="T37">em tìm hiểu</text:span><text:span text:style-name="T36"> biểu hiện của miRNA trong mẫu mô và máu ngoại vi khác nhau do cơ chế xuất nhập bào của miRNA giữa các tê bào; và việc lựa chọn input data từ 2 loại mẫu khác nhau em </text:span><text:span text:style-name="T37">nghĩ sẽ dẫn đến mục tiêu của xây dựng model khác nhau. </text:span><text:span text:style-name="T38">Theo anh thì em nên phân tích </text:span><text:span text:style-name="T39">database</text:span><text:span text:style-name="T40"> của miRNA trên mô kết hợp với database của circular miRNA như thế nào để xây dựng mô hình hợp lý?</text:span></text:p>
        </text:list-item>
        <text:list-item>
          <text:p text:style-name="P28"><text:span text:style-name="T41">Em đang dự định chỉnh sửa nội dung </text:span><text:span text:style-name="T21">đề cương bổ sung thêm phần thực nghiệm để đánh giá các kết quả phân loại của model đưa ra. Mục tiêu nghiên cứu ban đầu em làm wetlab kết hợp sau drylab là xác định các miRNA tiềm năng trở thành biomarker trong</text:span><text:span text:style-name="T42"> chẩn đoán sớm</text:span><text:span text:style-name="T21"> CRC trong plasma người Việt. </text:span><text:span text:style-name="T43">Tuy nhiên khi thực hiện pipline thì các database GSE đưa vào tập trung và các sample Healthy/no-cancer vs các loại bệnh → </text:span><text:span text:style-name="T21">Theo anh thì em để lựa chọn loại dữ liệu </text:span><text:span text:style-name="T43">input cho quy trình dựng ML model </text:span><text:span text:style-name="T21">như thế nào cho phù hợp ạ? </text:span><text:span text:style-name="T43">Bên cạnh đó, khi phân loại </text:span><text:soft-page-break/><text:span text:style-name="T43">mẫu plasma người Việt cho thực nghiệm, theo anh em có nên thực hiện trên cả các mẫu viêm, </text:span>polyp, loạn sản, Adenoma <text:span text:style-name="T43">luôn để có thể đạt được mục tiêu nghiên cứu ban đầu không ạ?</text:span> </text:p>
        </text:list-item>
      </text:list>
      <text:h text:style-name="P7" text:outline-level="1">Phân tích mức độ biểu hiện khác biệt (Difference Expression Gene – DEG):</text:h>
      <text:p text:style-name="P29" loext:marker-style-name="T44">Mức độ biểu hiện miRNA giữa nhóm mẫu bệnh và nhóm chứng có sự khác nhau nên sẽ được phân tích dựa trên phân tích biểu hiện khác biệt được thực hiện để tìm các miRNA được biểu hiện khác biệt (<text:span text:style-name="T14">Difference Expression – DE</text:span>) tron<text:span text:style-name="T45">g các điều kiện khác nhau.</text:span></text:p>
      <text:p text:style-name="P30" loext:marker-style-name="T1"><text:span text:style-name="T6">Cụ thể, sự biểu hiện khác biệt của các miRNA sẽ được so sánh giữa nhóm CRC – không ung thư, nhóm có u tuyến – không ung thư, nhóm CRCs – nhóm u tuyến. Kiểm định unpaired </text:span><text:span text:style-name="T46">t</text:span><text:span text:style-name="T6">-test với phương pháp </text:span><text:span text:style-name="T46">limma</text:span><text:span text:style-name="T6"> sẽ đưa một mô hình tuyến tính phù hợp với dữ liệu đã được chuẩn hóa và sau đó sử dụng phương pháp Bayes thực nghiệm để điều chỉnh các lỗi chuẩn của các thay đổi log-fold ước tính </text:span><text:bookmark-start text:name="ZOTERO_BREF_alMfcJZkiERG"/><text:span text:style-name="T6">[</text:span><text:span text:style-name="T47">2,</text:span><text:span text:style-name="T48">3</text:span><text:span text:style-name="T6">]</text:span><text:bookmark-end text:name="ZOTERO_BREF_alMfcJZkiERG"/><text:span text:style-name="T6">. DEGs của các miRNA được xác định với Log Fold Change: |log2 FC| ≥ 1; adj-p (adjust p-value) theo phương pháp False Discovery Rate: (FDR) &lt; 0.05 </text:span><text:bookmark-start text:name="ZOTERO_BREF_IkKoxoL5wXqT"/><text:span text:style-name="T6">[</text:span><text:span text:style-name="T48">3</text:span><text:span text:style-name="T6">]</text:span><text:bookmark-end text:name="ZOTERO_BREF_IkKoxoL5wXqT"/><text:span text:style-name="T6">. Để trực quan hóa, các gói "dplyr", "pheatmap" và "ggplot2" sẽ được sử dụng để tạo bản đồ nhiệt (heatmap) và biểu đồ núi lửa (volcano plot). </text:span></text:p>
      <text:p text:style-name="P31" loext:marker-style-name="T1"><text:span text:style-name="T6">Các dữ liệu được đưa vào phân tích sẽ có sự khác nhau về cỡ mẫu, quy trình thực nghiệm, dữ liệu kết quả thu được và cường độ tín hiệu liên quan đến từng miRNA khác nhau do sử dụng các công nghệ phân tích khác nhau. Vì thế việc sử dụng trực tiếp dữ liệu mà không qua xử lý sẽ dẫn đến hiệu quả kém khi thực hiện xây dựng mô hình học máy nên dữ liệu sau tiền xử lý và phân tích DEGs sẽ được chuẩn hóa bằng phương pháp </text:span><text:span text:style-name="T46">Standardization</text:span><text:span text:style-name="T6"> </text:span><text:bookmark-start text:name="ZOTERO_BREF_tJeGSCLsFDie"/><text:span text:style-name="T6">[</text:span><text:span text:style-name="T48">4</text:span><text:span text:style-name="T6">]</text:span><text:bookmark-end text:name="ZOTERO_BREF_tJeGSCLsFDie"/><text:span text:style-name="T6">. Sau khi chuẩn hóa, mỗi tập dữ liệu sẽ có một đặc tính với giá trị trung bình bằng 0 và độ lệch chuẩn bằn 1 trên toàn bộ tập dữ liệu. Tất cả các đặc tính (ký hiệu là </text:span><text:span text:style-name="T46">x</text:span><text:span text:style-name="T6">) sẽ được chuẩn hóa theo công thức:</text:span></text:p>
      <text:p text:style-name="P32" loext:marker-style-name="T1"><text:span text:style-name="T49">z</text:span><text:span text:style-name="T50">= </text:span><draw:frame draw:style-name="fr2" draw:name="Object1" text:anchor-type="as-char" svg:width="0.3173in" svg:height="0.3953in" draw:z-index="0"><draw:object xlink:href="./Object 1" xlink:type="simple" xlink:show="embed" xlink:actuate="onLoad"/><draw:image xlink:href="./ObjectReplacements/Object 1" xlink:type="simple" xlink:show="embed" xlink:actuate="onLoad"/><svg:desc>formula</svg:desc></draw:frame><text:span text:style-name="T50"><text:tab/></text:span><text:span text:style-name="T6">(1)</text:span></text:p>
      <text:p text:style-name="P33" loext:marker-style-name="T1">trong đó μ và σ là giá trị trung bình và độ lệch chuẩn của đặc tính <text:span text:style-name="T19">x</text:span> được tính toán trên tất cả các mẫu trong tập dữ liệu. Giá trị chuẩn hóa của <text:span text:style-name="T19">x </text:span>là <text:span text:style-name="T19">z</text:span> <text:bookmark-start text:name="ZOTERO_BREF_WVvgTfqX8azq"/>[<text:span text:style-name="T51">4</text:span>]<text:bookmark-end text:name="ZOTERO_BREF_WVvgTfqX8azq"/>. Bên cạch đó, để tìm ra các miRNA có giá trị khác biệt giữa nhóm bệnh và nhóm đối chứng của mỗi tệp dữ liệu thì giá trị p-value giữa hai nhóm bệnh và đối chứng được xác định. Khi p-value giảm, ý nghĩa thống kê tăng lên. Do đó, trong mỗi tệp dữ liệu các miRNA được sắp xếp theo thứ tự tăng dần dựa trên p-value của chúng <text:bookmark-start text:name="ZOTERO_BREF_aV6XcfuS0L3I"/>[<text:span text:style-name="T51">4</text:span>]<text:bookmark-end text:name="ZOTERO_BREF_aV6XcfuS0L3I"/>. Sau khi xử lý và chuẩn hóa dữ liệu, số liệu về mức độ biểu hiện của miRNA trong nhóm mẫu không ung thư/khỏe mạnh với nhóm CRCs sẽ được so sánh để đưa ra giá trị Mean cho mức độ biểu hiện miRNA giữa các nhóm thông qua kiểm nghiệm tham số, phi tham số.</text:p>
      <text:p text:style-name="P33" loext:marker-style-name="T1"/>
      <text:p text:style-name="P34" loext:marker-style-name="T1">→ <text:span text:style-name="T52">Thắc mắc về chỉ số Z-score:</text:span></text:p>
      <text:p text:style-name="P35" loext:marker-style-name="T1"><text:span text:style-name="T53"/></text:p>
      <text:p text:style-name="P36" loext:marker-style-name="T1">Khi em được hướng dẫn vẽ workflow Hình 1 <text:span text:style-name="T54">vào tháng 3/2026</text:span> thì thầy hướng dẫn và chị NCS phụ trách pipline code có mẫu thuẫn việc sử dụng Z-score sau khi đã thực hiện <text:span text:style-name="T55">DE</text:span> hay trước khi gộp+batch effect các GSE.</text:p>
      <text:p text:style-name="P37" loext:marker-style-name="T1">Trong pipline code em <text:span text:style-name="T56">chạy em</text:span> tham khảo <text:span text:style-name="T56">các pipline</text:span> của <text:span text:style-name="T56">các labmate</text:span> thì các bạn đang chạy chuẩn hóa bằng Quantile <text:span text:style-name="T57">bằng gói limma của R </text:span><text:span text:style-name="T56">và thực hiện Z-score sau khi chạy DE. Nên em thắc mắc về sự khác biệt của phương pháp Quantile với Zscore và có cần thiết chạy Z-score sau khi normalizeation các GSE không ạ? Nếu cần chạy Z-score thì em nên thực hiện ở bước nào ạ?</text:span></text:p>
      <text:p text:style-name="P33" loext:marker-style-name="T1"><text:soft-page-break/></text:p>
      <text:p text:style-name="P38" loext:marker-style-name="T1">Reference paper:</text:p>
      <text:p text:style-name="P38" loext:marker-style-name="T1">[<text:span text:style-name="T51">2</text:span>]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 </text:p>
      <text:p text:style-name="P38" loext:marker-style-name="T1">[<text:span text:style-name="T51">3</text:span>] Smyth, G.K.: Linear models and empirical bayes methods for assessing differential expression in microarray experiments. Stat Appl Genet Mol Biol. 3, Article3 (2004). <text:a xlink:type="simple" xlink:href="https://doi.org/10.2202/1544-6115.1027" text:style-name="Internet_20_link" text:visited-style-name="Visited_20_Internet_20_Link">https://doi.org/10.2202/1544-6115.1027</text:a></text:p>
      <text:p text:style-name="P39" loext:marker-style-name="T1">[<text:span text:style-name="T51">4</text:span>] Fahami, M.A., Roshanzamir, M., Izadi, N.H., Keyvani, V., Alizadehsani, R.: Detection of effective genes in colon cancer: A machine learning approach. Informatics in Medicine Unlocked. 24, 100605 (2021). <text:a xlink:type="simple" xlink:href="https://doi.org/10.1016/j.imu.2021.100605" text:style-name="Internet_20_link" text:visited-style-name="Visited_20_Internet_20_Link">https://doi.org/10.1016/j.imu.2021.100605</text:a></text:p>
      <text:h text:style-name="P40" text:outline-level="1"><text:s/>Lựa chọn đặc trưng (Feature Selection):</text:h>
      <text:p text:style-name="P41" loext:marker-style-name="T1"><text:span text:style-name="T4">Lựa chọn đặc trưng chủ yếu được áp dụng cho dữ liệu đa chiều; nói một cách đơn giản, lựa chọn đặc trưng là một kỹ thuật giảm chiều dữ liệu. Phương pháp Least Absolute Shrinkage and Selection Operator (LASSO), một phân tích hồi quy, thường được sử dụng để cải thiện độ chính xác của dự đoán. Nó thuộc họ mô hình hồi quy tuyến tính và sử dụng xác thực chéo mười lần mặc định. Phân tích hồi quy LASSO đã được sử dụng rộng rãi trong các nghiên cứu để sàng lọc các yếu tố chẩn đoán hoặc tiên lượng </text:span><text:span text:style-name="T58">[</text:span><text:span text:style-name="T59">5]</text:span><text:span text:style-name="T4">. Bên cạnh đó, nhóm sẽ thực hiện thêm thuật toán Recursive Feature Addition (RFA) để đưa ra các miRNA có các dữ liệu đặc trưng và quan trọng nhất ở các nhóm dữ liệu mẫu chứng và mẫu CRCs. </text:span></text:p>
      <text:p text:style-name="P41" loext:marker-style-name="T60"><text:span text:style-name="T4">Để chọn ra những DEG tốt nhất để phát triển bộ phân loại dựa trên gen cho quá trình tiến hóa của u tuyến-CRC, thuật toán Boruta và Stepwise Regression được sử dụng tuần tự </text:span><text:bookmark-start text:name="ZOTERO_BREF_fPDx3MwKBtgn"/><text:span text:style-name="T4">[</text:span><text:span text:style-name="T7">6</text:span><text:span text:style-name="T4">]</text:span><text:bookmark-end text:name="ZOTERO_BREF_fPDx3MwKBtgn"/><text:span text:style-name="T4">. Thuật toán Boruta có trong gói ‘Boruta’ của ngôn ngữ lập trình R; sử dụng phương pháp bao bọc được xây dựng xung quanh bộ phân loại Rừng ngẫu nhiên (Random Forest) để thực hiện lựa chọn đặc trưng có giám sát và mạnh mẽ. Boruta dựa trên cùng một ý tưởng tạo thành cơ sở của bộ phân loại Rừng ngẫu nhiên. Thuật toán Random Forest dựa trên các nguyên tắc bagging (Bootstrap Aggregating) và lựa chọn đặc trưng ngẫu nhiên, giúp giảm phương sai của mô hình và tránh hiện tượng quá khớp. Trong quá trình xây dựng mỗi cây, rừng ngẫu nhiên chọn một tập hợp con các đặc trưng ngẫu nhiên tại mỗi điểm phân chia. Quá trình này, được gọi là Feature Bagging, đảm bảo rằng các cây không tương quan, làm giảm thêm nguy cơ quá khớp </text:span><text:bookmark-start text:name="ZOTERO_BREF_4QFUNqv8A93B"/><text:span text:style-name="T4">[</text:span><text:span text:style-name="T7">7</text:span><text:span text:style-name="T4">]</text:span><text:bookmark-end text:name="ZOTERO_BREF_4QFUNqv8A93B"/></text:p>
      <text:p text:style-name="P41" loext:marker-style-name="T1"><text:span text:style-name="T4">Boruta khởi tạo quá trình bằng cách tạo ra các đặc điểm bóng. Đây là các bản sao của các đặc điểm gốc với các giá trị được xáo trộn ngẫu nhiên, hoạt động như các đặc điểm nhiễu. Bước này rất quan trọng vì nó cung cấp một đường cơ sở để so sánh ý nghĩa của các đặc điểm gốc với nhiễu </text:span><text:bookmark-start text:name="ZOTERO_BREF_zWA7JkPtD82f"/><text:span text:style-name="T4">[</text:span><text:span text:style-name="T7">7</text:span><text:span text:style-name="T4">]</text:span><text:bookmark-end text:name="ZOTERO_BREF_zWA7JkPtD82f"/><text:span text:style-name="T4">. Thuật toán huấn luyện một bộ phân loại rừng ngẫu nhiên trên tập dữ liệu mở rộng, bao gồm cả đặc điểm gốc và đặc điểm bóng. Ý nghĩa của mỗi đặc điểm được đo bằng cách sử dụng mức giảm trung bình của chỉ số Gini hoặc bất kỳ số liệu phù hợp nào khác do rừng ngẫu nhiên cung cấp. Điểm ý nghĩa của các đặc điểm gốc được so sánh với điểm ý nghĩa cao nhất của các đặc điểm bóng </text:span><text:bookmark-start text:name="ZOTERO_BREF_hrOWdKn6MA00"/><text:span text:style-name="T4">[</text:span><text:span text:style-name="T7">7</text:span><text:span text:style-name="T4">]</text:span><text:bookmark-end text:name="ZOTERO_BREF_hrOWdKn6MA00"/><text:span text:style-name="T4">. Nếu một đặc điểm gốc có điểm ý nghĩa cao hơn đáng kể so với đặc điểm bóng tốt nhất, thì nó được coi là có ý nghĩa. Ngược lại, nếu một đặc điểm gốc có </text:span><text:soft-page-break/><text:span text:style-name="T4">điểm ý nghĩa thấp hơn, thì nó được coi là không có ý nghĩa. Các đặc điểm được xác định là không có ý nghĩa sau đó sẽ bị loại khỏi tập dữ liệu. Quá trình này được lặp lại liên tục cho đến khi đạt được điều kiện dừng được xác định trước, chẳng hạn như số lần lặp tối đa hoặc tính ổn định trong việc lựa chọn đặc điểm. Sau khi hoàn tất các lần lặp, các đặc điểm được phân loại thành ba nhóm: có ý nghĩa đã xác nhận, không có ý nghĩa đã xác nhận và tạm thời. Các đặc điểm tạm thời cần được phân tích thêm để xác định ý nghĩa của chúng </text:span><text:bookmark-start text:name="ZOTERO_BREF_CdMZ78q71lgA"/><text:span text:style-name="T4">[</text:span><text:span text:style-name="T7">7</text:span><text:span text:style-name="T4">]</text:span><text:bookmark-end text:name="ZOTERO_BREF_CdMZ78q71lgA"/><text:span text:style-name="T4">.</text:span><text:span text:style-name="T61"> </text:span></text:p>
      <text:p text:style-name="P42" loext:marker-style-name="T1"/>
      <text:p text:style-name="P43" loext:marker-style-name="T1">reference paper:</text:p>
      <text:p text:style-name="P44" loext:marker-style-name="T1">[5] Alzubi, J., Nayyar, A., Kumar, A.: Machine Learning from Theory to Algorithms: An Overview. J. Phys.: Conf. Ser. 1142, 012012 (2018). <text:a xlink:type="simple" xlink:href="https://doi.org/10.1088/1742-6596/1142/1/012012" text:style-name="Internet_20_link" text:visited-style-name="Visited_20_Internet_20_Link">https://doi.org/10.1088/1742-6596/1142/1/012012</text:a></text:p>
      <text:p text:style-name="P44" loext:marker-style-name="T1">[6]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text:p>
      <text:p text:style-name="P44" loext:marker-style-name="T1">[7] Hamidi, F., Gilani, N., Kazemnejad, A., Aftabi, Y., Shirforoush-Sattari, M., Jahanimoghadam, A.: Decision tree-based machine learning methods for identifying colorectal cancer-associated microRNA signatures and their regulatory networks. Sci Rep. 15, 34700 (2025). <text:a xlink:type="simple" xlink:href="https://doi.org/10.1038/s41598-025-17037-7" text:style-name="Internet_20_link" text:visited-style-name="Visited_20_Internet_20_Link">https://doi.org/10.1038/s41598-025-17037-7</text:a></text:p>
      <text:p text:style-name="P44" loext:marker-style-name="T1"/>
      <text:h text:style-name="P45" text:outline-level="1"><text:s/><text:bookmark-start text:name="_Toc223411324"/>Lựa chọn và thiết lập mô hình học máy:<text:bookmark-end text:name="_Toc223411324"/></text:h>
      <text:p text:style-name="P46" loext:marker-style-name="T1">Để xác định các mối liên kết và mẫu giữa tập hợp các biến đầu vào, xác minh xem biểu hiện miRNA có thể mô tả giữa hai nhóm bệnh và nhóm đối chứng hay không, nhóm nghiên cứu thực hiện các thuật toán theo phương pháp chính: học có giám sát (Under Supervised Learning). Phương pháp học có giám sát (Under Supervised Learning) được sử dụng cho xây dựng học máy để phân loại và kết quả trả ra là có hoặc không hoặc nhị phân 0-1 như (tốt hoặc xấu) để có được kết quả đa lớp như (ví dụ: cây, bụi cây hoặc cỏ). Hồi quy (Regression) một phần phụ khác của loại học có giám sát, trong đó các thuật toán được sử dụng trong loại này luôn tạo ra một giá trị số. Phân cụm (Clustering) là một phân của phương pháp học có giám sát với nhiệm vụ là nhóm các tập dữ liệu chưa được gắn nhãn, chính xác hơn, đó là một phương pháp nhóm các điểm dữ liệu thành các cụm riêng biệt dựa trên sự tương đồng của chúng <text:bookmark-start text:name="ZOTERO_BREF_cPoYx4iGCc3i Copy 1 Copy 1"/>[<text:span text:style-name="T51">8</text:span>]<text:bookmark-end text:name="ZOTERO_BREF_cPoYx4iGCc3i Copy 1 Copy 1"/>.</text:p>
      <text:p text:style-name="P47" loext:marker-style-name="T1"><text:span text:style-name="T4">Các thuật toán được sử dụng để xây dựng mô hình học máy gồm: Hồi quy tuyến tính (Linear Regression), Hồi quy Logistic (Logistic Regression), <text:s/>Máy hỗ trợ vectơ (Support Vector Machine), Naïve Bayes, K-Means </text:span><text:span text:style-name="T62">Clustering</text:span><text:span text:style-name="T4">, K-Nearest Neighbors, Decision Tree, Thuật toán giảm chiều dữ liệu (Dimensionality Reduction Algorithms), Artificial Neural Networks.</text:span></text:p>
      <text:p text:style-name="P48" loext:marker-style-name="T1"/>
      <text:p text:style-name="P49" loext:marker-style-name="T1">Reference paper:</text:p>
      <text:p text:style-name="P49" loext:marker-style-name="T1"><text:soft-page-break/>[8] Solomon, D.D., Sonia, Kumar, K., Kanwar, K., Iyer, S., Kumar, M.: Extensive Review on the Role of Machine Learning for Multifactorial Genetic Disorders Prediction. Arch Computat Methods Eng. 31, 623–640 (2024). https://doi.org/10.1007/s11831-023-09996-9</text:p>
      <text:p text:style-name="P46" loext:marker-style-name="T1"/>
      <text:p text:style-name="P50" loext:marker-style-name="T1">→ <text:span text:style-name="T51">Thắc mắc về việc lựa chọn model phù hợp</text:span><text:span text:style-name="T63">+kết quả đưa ra của final model</text:span><text:span text:style-name="T51">:</text:span></text:p>
      <text:p text:style-name="P51" loext:marker-style-name="T1">Các model em kể ở phần nội dung trên và 7 model em thực hiện trong pipline code là các model mà lab đang thực hiện và em tham khảo để chạy. Tuy nhiên cách <text:span text:style-name="T64">xây</text:span> dựng model hiện tại em được hướng dẫn là chạy các model có thể và cho ra model có các chỉ số tối ưu nhất làm final model. <text:span text:style-name="T65">Bên cạnh đó, các kết quả model trả ra trong pipline em chạy thì em không ra được các dữ </text:span><text:span text:style-name="T66">liệu phân biệt sư thay đổi biểu hiện của miRNA giữa mẫu CRC với No Cancer, </text:span><text:span text:style-name="T67">vì thế em chạy thêm phần “xu hướng sinh học” trong pipline code.</text:span></text:p>
      <text:list text:style-name="L3">
        <text:list-item>
          <text:p text:style-name="P52" loext:marker-style-name="T1"><text:span text:style-name="T68">em thắc mắc </text:span><text:span text:style-name="T69">sau khi em</text:span><text:span text:style-name="T70"> phân</text:span><text:span text:style-name="T69"> tích DE và Feature Selection </text:span><text:span text:style-name="T71">thu </text:span><text:span text:style-name="T69">được danh sách 11 miRNA </text:span><text:span text:style-name="T72">tiềm năng</text:span><text:span text:style-name="T69"> với giá trị logFC và <text:s/>adj.P.Val </text:span><text:span text:style-name="T71">thì </text:span><text:span text:style-name="T70">làm thế nào để em có thể đưa ra được các tiêu chí để lựa chọn các model để xây dựng-huấn luyện ạ?</text:span></text:p>
        </text:list-item>
        <text:list-item>
          <text:p text:style-name="P53" loext:marker-style-name="T1"><text:span text:style-name="T73"><text:s/></text:span><text:span text:style-name="T74">Hội đồng duyệt đề cương có hỏi em rằng khi đã có danh sách các miRNA tiềm năng rồi thì tại sao phải cần sử dụng model để phân loại nữa. Theo anh thì em nên giải thích theo góc độ toán học và sinh học như thế nào ạ? Và anh có nhận xét góp ý chỉnh sửa hình workflow ở bước đánh giá final model như thế nào cho phù hợp hay logic hơn không ạ?</text:span></text:p>
        </text:list-item>
      </text:list>
      <text:p text:style-name="P54" loext:marker-style-name="T1"/>
      <text:list xml:id="list12537772701217" text:continue-list="list3191570299" text:style-name="WWNum9">
        <text:list-item>
          <text:list>
            <text:list-header>
              <text:h text:style-name="P55" text:outline-level="2" loext:marker-style-name="T1"><text:bookmark-start text:name="__RefHeading___Toc3445_1102695421"/><text:span text:style-name="T75">5. </text:span><text:bookmark-start text:name="_Toc223508765"/><text:span text:style-name="T6">Đánh giá mô hình học máy</text:span><text:bookmark-end text:name="__RefHeading___Toc3445_1102695421"/><text:bookmark-end text:name="_Toc223508765"/></text:h>
            </text:list-header>
          </text:list>
        </text:list-item>
      </text:list>
      <text:p text:style-name="P46" loext:marker-style-name="T1">Khi dữ liệu được thu thập và chuẩn bị một cách thích hợp, thì cần phải chọn một mô hình phù hợp. Không phải mọi thuật toán học máy đều phù hợp với mọi vấn đề. Các mô hình ML cần được xem xét hoặc lựa chọn cuối cùng được xác định bởi khối lượng và bản chất của dữ liệu. Để kiểm tra mô hình học máy đã huấn luyện thì tập dữ liệu kiểm tra (Testing) được sử dụng để kiểm tra mô hình nhằm hiểu rõ hơn về hiệu suất của mô hình. </text:p>
      <text:p text:style-name="P56" loext:marker-style-name="T1"><text:span text:style-name="T4">Độ tin cậy của mô hình được kiểm chứng bằng phương pháp Kiểm chứng chéo </text:span><text:bookmark-start text:name="ZOTERO_BREF_LLdBvJ4695cE"/><text:span text:style-name="T4">[</text:span><text:span text:style-name="T76">9</text:span><text:span text:style-name="T4">]</text:span><text:bookmark-end text:name="ZOTERO_BREF_LLdBvJ4695cE"/><text:span text:style-name="T4">. Kiểm chứng chéo (Cross-Validation) có tầm quan trọng to lớn trong việc xây dựng mô hình học máy bằng cách so sánh, lựa chọn các mô hình phù hợp và đánh giá hiệu suất dự báo của chúng. Quá trình này không chỉ giới hạn ở giai đoạn huấn luyện mô hình mà còn bao gồm việc đánh giá hiệu suất của mô hình trên tập dữ liệu mới (dữ liệu thử nghiệm) </text:span><text:bookmark-start text:name="ZOTERO_BREF_F5tPWnv4B29E"/><text:span text:style-name="T4">[</text:span><text:span text:style-name="T76">10</text:span><text:span text:style-name="T4">]</text:span><text:bookmark-end text:name="ZOTERO_BREF_F5tPWnv4B29E"/><text:span text:style-name="T4">. Kiểm chứng chéo K-fold dễ xây dựng, dễ điều chỉnh và ít phụ thuộc vào cấu trúc của mô hình. Phương pháp Kiểm chứng chéo K-fold chia tập dữ liệu thành các tập con k-so sánh được hoặc nếp gấp (</text:span><text:span text:style-name="T77">k-comparable subsets or folds</text:span><text:span text:style-name="T4">). Việc gấp phân vùng (</text:span><text:span text:style-name="T77">partition folding</text:span><text:span text:style-name="T4">) được huấn luyện và kiểm tra trong K lần lặp, và phần còn lại của mô hình gấp K-1 được kiểm tra và huấn luyện bằng phương pháp gấp. Các giá trị K phổ biến nhất là 5 và 10 </text:span><text:bookmark-start text:name="ZOTERO_BREF_1lcjo3y69GIB"/><text:span text:style-name="T4">[</text:span><text:span text:style-name="T76">10</text:span><text:span text:style-name="T4">]</text:span><text:bookmark-end text:name="ZOTERO_BREF_1lcjo3y69GIB"/><text:span text:style-name="T6">. </text:span></text:p>
      <text:p text:style-name="P56"><text:span text:style-name="T4">Trong nghiên cứu này sẽ áp dụng kiểm chứng chéo </text:span><text:span text:style-name="T77">k</text:span><text:span text:style-name="T4">- fold </text:span><text:bookmark-start text:name="ZOTERO_BREF_lLklSeqBviU7"/><text:span text:style-name="T4">[</text:span><text:span text:style-name="T76">9</text:span><text:span text:style-name="T4">, </text:span><text:span text:style-name="T76">11</text:span><text:span text:style-name="T4">]</text:span><text:bookmark-end text:name="ZOTERO_BREF_lLklSeqBviU7"/><text:span text:style-name="T78">;</text:span><text:span text:style-name="T4"> cụ thể đầu tiên, tập dữ liệu được chi thành </text:span><text:span text:style-name="T77">k</text:span><text:span text:style-name="T4"> phần và mô hình được áp dụng cho </text:span><text:span text:style-name="T77">k</text:span><text:span text:style-name="T4"> phần đó. Sau đó, trên </text:span><text:span text:style-name="T77">k </text:span><text:span text:style-name="T4">mẫu con, một mẫu con duy nhất được giữ lại làm dữ liệu xác thực để kiểm tra mô hình, và </text:span><text:span text:style-name="T79">k</text:span><text:span text:style-name="T80">-1</text:span><text:span text:style-name="T4"> mẫu con còn lại được sử dụng làm dữ liệu huấn luyện. Quá trình xác thực chéo sau đó được lặp lại nhiều </text:span><text:soft-page-break/><text:span text:style-name="T4">lần, với mỗi mẫu con trong </text:span><text:span text:style-name="T77">k</text:span><text:span text:style-name="T4"> mẫu con được sử dụng một lần làm dữ liệu xác thực </text:span><text:bookmark-start text:name="ZOTERO_BREF_INBbY5MEXR77"/><text:span text:style-name="T4">[</text:span><text:span text:style-name="T76">9</text:span><text:span text:style-name="T4">]</text:span><text:bookmark-end text:name="ZOTERO_BREF_INBbY5MEXR77"/><text:span text:style-name="T6">. Ở giai đoạn sau, giá trị trung bình thu được từ các mô hình được đánh giá theo phương pháp xác thực chéo.</text:span></text:p>
      <text:p text:style-name="P56" loext:marker-style-name="T1"><text:span text:style-name="T4">Mô hình học máy trước khi được đưa vào ứng dụng thực tế thì cần được thực hiện thử nghiệm trên tập dữ liệu mà mô hình chưa được huấn luyện hoặc kiểm tra (External Validation) để đo lường hiệu suất khách quan, nhằm đảm bảo mô hình không chỉ hoạt động tốt trên dữ liệu đã được sử dụng trong quá trình huấn luyện và kiểm tra mà còn có khả năng dự đoán tốt trên dữ liệu mới chưa qua huấn luyện. Hiệu suất của mô hình phân loại được đánh giá bằng các thông số sau </text:span><text:bookmark-start text:name="ZOTERO_BREF_uGcmFKw1uL3T"/><text:span text:style-name="T4">[</text:span><text:span text:style-name="T76">9</text:span><text:span text:style-name="T4">]</text:span><text:bookmark-end text:name="ZOTERO_BREF_uGcmFKw1uL3T"/><text:span text:style-name="T6">:</text:span></text:p>
      <text:list text:continue-list="list12538174503685" text:style-name="WWNum4">
        <text:list-item>
          <text:p text:style-name="P57"><text:span text:style-name="T4">Diện tích dưới đường cong (AUC) là thước đo khả năng của bộ phân loại để phân biệt giữa các lớp và được sử dụng làm bản tóm tắt của đường cong ROC, được ước tính bởi hàm 'multiclass.roc' từ gói 'pROC' </text:span><text:bookmark-start text:name="ZOTERO_BREF_6KShdzKThstp"/><text:span text:style-name="T4">[</text:span><text:span text:style-name="T76">12</text:span><text:span text:style-name="T4">]</text:span><text:bookmark-end text:name="ZOTERO_BREF_6KShdzKThstp"/><text:span text:style-name="T6"> trong R.</text:span></text:p>
        </text:list-item>
        <text:list-item>
          <text:p text:style-name="P57" loext:marker-style-name="T1"><text:span text:style-name="T4">Độ nhạy (Sensitivity – Se) là tỷ lệ phần trăm tổng số quan sát có liên quan thực sự được thu thập </text:span><text:bookmark-start text:name="ZOTERO_BREF_QW9Gv3Kep2Ab"/><text:span text:style-name="T4">[</text:span><text:span text:style-name="T76">9</text:span><text:span text:style-name="T4">]</text:span><text:bookmark-end text:name="ZOTERO_BREF_QW9Gv3Kep2Ab"/><text:span text:style-name="T6">: </text:span></text:p>
        </text:list-item>
      </text:list>
      <text:p text:style-name="P58" loext:marker-style-name="T1"><text:span text:style-name="T4">Se= </text:span><draw:frame draw:style-name="fr2" draw:name="Object2" text:anchor-type="as-char" svg:width="0.7972in" svg:height="0.4236in" draw:z-index="1"><draw:object xlink:href="./Object 2" xlink:type="simple" xlink:show="embed" xlink:actuate="onLoad"/><draw:image xlink:href="./ObjectReplacements/Object 2" xlink:type="simple" xlink:show="embed" xlink:actuate="onLoad"/><svg:desc>formula</svg:desc></draw:frame><text:span text:style-name="T4">x100</text:span></text:p>
      <text:list text:continue-numbering="true" text:style-name="WWNum4">
        <text:list-item>
          <text:p text:style-name="P59"><text:span text:style-name="T4">Độ đặc hiệu (Specificity – Sp) đo lường số lượng kết quả âm tính thực tế được dự đoán là âm tính </text:span><text:bookmark-start text:name="ZOTERO_BREF_Ak9qqnuGBYf8"/><text:span text:style-name="T4">[</text:span><text:span text:style-name="T76">13</text:span><text:span text:style-name="T4">]</text:span><text:bookmark-end text:name="ZOTERO_BREF_Ak9qqnuGBYf8"/><text:span text:style-name="T6">:</text:span></text:p>
        </text:list-item>
      </text:list>
      <text:p text:style-name="P60" loext:marker-style-name="T1"><text:span text:style-name="T4">Sp= </text:span><draw:frame draw:style-name="fr2" draw:name="Object3" text:anchor-type="as-char" svg:width="0.798in" svg:height="0.4484in" draw:z-index="2"><draw:object xlink:href="./Object 3" xlink:type="simple" xlink:show="embed" xlink:actuate="onLoad"/><draw:image xlink:href="./ObjectReplacements/Object 3" xlink:type="simple" xlink:show="embed" xlink:actuate="onLoad"/><svg:desc>formula</svg:desc></draw:frame><text:span text:style-name="T4"><text:s/>x100</text:span></text:p>
      <text:list text:continue-numbering="true" text:style-name="WWNum4">
        <text:list-item>
          <text:p text:style-name="P59" loext:marker-style-name="T1"><text:span text:style-name="T4">Độ chính xác (Accuracy – Acc) tỷ lệ kết quả đúng trong tổng số trường hợp được kiểm tra </text:span><text:bookmark-start text:name="ZOTERO_BREF_Qhtp2KAQ2nAp"/><text:span text:style-name="T4">[</text:span><text:span text:style-name="T76">9</text:span><text:span text:style-name="T4">]</text:span><text:bookmark-end text:name="ZOTERO_BREF_Qhtp2KAQ2nAp"/><text:span text:style-name="T6">:</text:span></text:p>
        </text:list-item>
      </text:list>
      <text:p text:style-name="P60" loext:marker-style-name="T1"><text:span text:style-name="T78">Acc</text:span><text:span text:style-name="T81">i</text:span><text:span text:style-name="T82">= </text:span><draw:frame draw:style-name="fr2" draw:name="Object4" text:anchor-type="as-char" svg:width="1.4217in" svg:height="0.4453in" draw:z-index="3"><draw:object xlink:href="./Object 4" xlink:type="simple" xlink:show="embed" xlink:actuate="onLoad"/><draw:image xlink:href="./ObjectReplacements/Object 4" xlink:type="simple" xlink:show="embed" xlink:actuate="onLoad"/><svg:desc>formula</svg:desc></draw:frame></text:p>
      <text:p text:style-name="P61" loext:marker-style-name="T1"><text:span text:style-name="T83">TPi = True Positive; FPi = False Positive; TNi = True Negative; FNi = False Negative </text:span><text:span text:style-name="T78">lần lượt là dương tính thật, âm tính thật, dương tính giả và âm tính giả</text:span><text:span text:style-name="T84"> </text:span><text:span text:style-name="T4">trong bài toán phân loại với </text:span><text:span text:style-name="T77">N</text:span><text:span text:style-name="T4"> lớp, độ chính xác cho lớp </text:span><text:span text:style-name="T77">i</text:span><text:span text:style-name="T4"> </text:span><text:bookmark-start text:name="ZOTERO_BREF_jZZuhmwf0N6W"/><text:span text:style-name="T4">[</text:span><text:span text:style-name="T76">9</text:span><text:span text:style-name="T4">]</text:span><text:bookmark-end text:name="ZOTERO_BREF_jZZuhmwf0N6W"/></text:p>
      <text:list text:continue-numbering="true" text:style-name="WWNum4">
        <text:list-item>
          <text:p text:style-name="P59"><text:span text:style-name="T78">Hệ số tương quan Matthews (Matthews Correlation Coefficient – MCC) đo lường chất lượng phân loại nhị phân </text:span><text:bookmark-start text:name="ZOTERO_BREF_Hw2zXdHSAAeM"/><text:span text:style-name="T78">[</text:span><text:span text:style-name="T85">13</text:span><text:span text:style-name="T78">]</text:span><text:bookmark-end text:name="ZOTERO_BREF_Hw2zXdHSAAeM"/><text:span text:style-name="T6">:</text:span></text:p>
        </text:list-item>
      </text:list>
      <text:p text:style-name="P60" loext:marker-style-name="T1"><text:span text:style-name="T78">MCC = </text:span><draw:frame draw:style-name="fr2" draw:name="Object5" text:anchor-type="as-char" svg:width="3.278in" svg:height="0.4571in" draw:z-index="4"><draw:object xlink:href="./Object 5" xlink:type="simple" xlink:show="embed" xlink:actuate="onLoad"/><draw:image xlink:href="./ObjectReplacements/Object 5" xlink:type="simple" xlink:show="embed" xlink:actuate="onLoad"/><svg:desc>formula</svg:desc></draw:frame></text:p>
      <text:list text:continue-numbering="true" text:style-name="WWNum4">
        <text:list-item>
          <text:p text:style-name="P59"><text:span text:style-name="T78">Giá trị dự đoán dương tính (Positive Predictive Value – PPV) đo lường tỷ lệ dự đoán dương tính được dự đoán đúng </text:span><text:bookmark-start text:name="ZOTERO_BREF_M4qMquCRUeKo"/><text:span text:style-name="T78">[</text:span><text:span text:style-name="T85">13</text:span><text:span text:style-name="T78">]</text:span><text:bookmark-end text:name="ZOTERO_BREF_M4qMquCRUeKo"/><text:span text:style-name="T6">:</text:span></text:p>
        </text:list-item>
      </text:list>
      <text:p text:style-name="P60" loext:marker-style-name="T1"><text:span text:style-name="T78">PPV = </text:span><draw:frame draw:style-name="fr2" draw:name="Object6" text:anchor-type="as-char" svg:width="0.7154in" svg:height="0.411in" draw:z-index="5"><draw:object xlink:href="./Object 6" xlink:type="simple" xlink:show="embed" xlink:actuate="onLoad"/><draw:image xlink:href="./ObjectReplacements/Object 6" xlink:type="simple" xlink:show="embed" xlink:actuate="onLoad"/><svg:desc>formula</svg:desc></draw:frame><text:span text:style-name="T78"><text:s/>x 100</text:span></text:p>
      <text:list text:continue-numbering="true" text:style-name="WWNum4">
        <text:list-item>
          <text:p text:style-name="P59" loext:marker-style-name="T1"><text:span text:style-name="T78">Độ chính xác (Precision) </text:span><text:span text:style-name="T4">là tỷ lệ các quan sát có liên quan trong số các quan sát được thu thập </text:span><text:bookmark-start text:name="ZOTERO_BREF_iJ29iyMX0mPg"/><text:span text:style-name="T4">[</text:span><text:span text:style-name="T76">9</text:span><text:span text:style-name="T4">]</text:span><text:bookmark-end text:name="ZOTERO_BREF_iJ29iyMX0mPg"/><text:span text:style-name="T6">:</text:span></text:p>
        </text:list-item>
      </text:list>
      <text:p text:style-name="P60" loext:marker-style-name="T1"><text:span text:style-name="T78">Prec = </text:span><draw:frame draw:style-name="fr2" draw:name="Object7" text:anchor-type="as-char" svg:width="0.5807in" svg:height="0.3953in" draw:z-index="6"><draw:object xlink:href="./Object 7" xlink:type="simple" xlink:show="embed" xlink:actuate="onLoad"/><draw:image xlink:href="./ObjectReplacements/Object 7" xlink:type="simple" xlink:show="embed" xlink:actuate="onLoad"/><svg:desc>formula</svg:desc></draw:frame></text:p>
      <text:list text:continue-numbering="true" text:style-name="WWNum4">
        <text:list-item>
          <text:p text:style-name="P59" loext:marker-style-name="T1"><text:span text:style-name="T78">F1 score là giá trị trung bình hài hòa của độ chính xác và độ nhạy </text:span><text:bookmark-start text:name="ZOTERO_BREF_BOPiFVUwxko3"/><text:span text:style-name="T78">[</text:span><text:span text:style-name="T85">9</text:span><text:span text:style-name="T78">]</text:span><text:bookmark-end text:name="ZOTERO_BREF_BOPiFVUwxko3"/><text:span text:style-name="T6">:</text:span></text:p>
        </text:list-item>
      </text:list>
      <text:p text:style-name="P60" loext:marker-style-name="T1"><text:soft-page-break/><text:span text:style-name="T4">F1= 2 x </text:span><draw:frame draw:style-name="fr2" draw:name="Object8" text:anchor-type="as-char" svg:width="0.8839in" svg:height="0.3953in" draw:z-index="7"><draw:object xlink:href="./Object 8" xlink:type="simple" xlink:show="embed" xlink:actuate="onLoad"/><draw:image xlink:href="./ObjectReplacements/Object 8" xlink:type="simple" xlink:show="embed" xlink:actuate="onLoad"/><svg:desc>formula</svg:desc></draw:frame></text:p>
      <text:p text:style-name="P47"><text:span text:style-name="T4">Acc, Se, Sp và PPV đều trả về giá trị phần trăm từ 0 đến 100, trong đó số càng cao biểu thị dự đoán càng chính xác. MCC thường được sử dụng trong học máy và được coi là một thước đo cân bằng, đồng thời là một trong những thước đo hữu ích nhất của bộ phân loại nhị phân. MCC trả về giá trị từ -1 đến 1. Hệ số +1 biểu thị dự đoán hoàn hảo, 0 biểu thị dự đoán ngẫu nhiên trung bình và -1 biểu thị nghịch đảo </text:span><text:bookmark-start text:name="ZOTERO_BREF_qv0VEnmwdURj"/><text:span text:style-name="T4">[</text:span><text:span text:style-name="T76">13</text:span><text:span text:style-name="T4">]</text:span><text:bookmark-end text:name="ZOTERO_BREF_qv0VEnmwdURj"/><text:span text:style-name="T4">. PPV cũng là một công cụ hữu ích để phân tích các công cụ dự đoán miRNA vì việc xác minh thực nghiệm các dự đoán này có thể rất khó khăn và tốn thời gian, nhưng nếu công cụ đó có PPV rất cao thì người dùng có thể tin tưởng hơn vào dự đoán đó </text:span><text:bookmark-start text:name="ZOTERO_BREF_eu5nziJoPDIO"/><text:span text:style-name="T4">[</text:span><text:span text:style-name="T76">13</text:span><text:span text:style-name="T4">]</text:span><text:bookmark-end text:name="ZOTERO_BREF_eu5nziJoPDIO"/><text:span text:style-name="T4">. </text:span><text:span text:style-name="T86">Hiệu suất của mô hình được xác thực bằng cách sử dụng các</text:span><text:span text:style-name="T4"> tập dữ liệu xác thực đọc lập (External Validation). Mô hình có AUC (Diện tích dưới đường cong) trung bình cao nhất trên các dữ liệu huấn luyện và xác thực là mô hình tối ưu</text:span></text:p>
      <text:p text:style-name="P62"/>
      <text:list text:continue-list="list12537772701217" text:style-name="WWNum9">
        <text:list-item>
          <text:list>
            <text:list-item>
              <text:h text:style-name="P63" text:outline-level="2" loext:marker-style-name="T1"><text:bookmark-start text:name="__RefHeading___Toc3447_1102695421"/><text:span text:style-name="T6">Phân tích mạng lưới điều hòa miRNA-mRNA và phân tích làm giàu tập hợp gen (GSEA – Gene Set Enrichment Analysis)</text:span><text:bookmark-end text:name="__RefHeading___Toc3447_1102695421"/></text:h>
            </text:list-item>
          </text:list>
        </text:list-item>
      </text:list>
      <text:p text:style-name="P64">miRNA đóng vai trò quan trọng trong việc điều hòa các quá trình sinh học ở động vật, thực vật và nấm với cơ chế điều hòa biểu hiện các mRNA mục tiêu và sự rối loạn điều hòa mức độ biểu hiện của miRNA sẽ tác động đến phát triển và hình thành khối u với vài trò như một gen sinh ung (oncogenes) hoặc gen ức chế khối <text:bookmark-start text:name="ZOTERO_BREF_n52WO7di0jJh Copy 1 Copy 1"/>[<text:span text:style-name="T87">14</text:span>]<text:bookmark-end text:name="ZOTERO_BREF_n52WO7di0jJh Copy 1 Copy 1"/>. Bên cạnh đó, miRNA thường nhắm mục tiêu vào nhiều mRNA cùng một lúc, và ngược lại, một mRNA duy nhất có thể được điều chỉnh bởi nhiều miRNA, tạo thành các mạng lưới phức tạp đảm bảo kiểm soát biểu hiện gen mạnh mẽ, cụ thể trong ung thư thì các mạng lưới này trải qua quá trình lập trình lại, với sự thay đổi trong miRNA trung tâm góp phần vào cơ chế bệnh sinh.</text:p>
      <text:p text:style-name="P46">Để đánh giá mối quan hệ giữa microRNA – gen đích và tương tác giữa các miRNA – miRNA, hai cơ sở dữ liệu khác được sử dụng để thực hiện phân tích, sàng lọc các gen đích của các miRNA mục tiêu là:</text:p>
      <text:p text:style-name="P46"/>
      <text:list text:style-name="WWNum10">
        <text:list-item>
          <text:list>
            <text:list-item>
              <text:p text:style-name="P65"><text:span text:style-name="T4">Thu nhận danh sách các gen mục tiêu của miRNA từ cơ sở dữ liệu trực tuyến miRTarBase – một cơ sở dữ liệu về tương tác miRNA–mục tiêu (miRNA–target interactions – MTI) đã được xác thực bằng thực nghiệm (</text:span><text:a xlink:type="simple" xlink:href="https://mirtarbase.cuhk.edu.cn/~miRTarBase/miRTarBase_2025" text:style-name="Internet_20_link" text:visited-style-name="Visited_20_Internet_20_Link"><text:span text:style-name="Internet_20_link"><text:span text:style-name="T4">https://mirtarbase.cuhk.edu.cn/~miRTarBase/miRTarBase_2025</text:span></text:span></text:a><text:span text:style-name="T4">). Việc đánh giá mạng lưới miRNA–mRNA và miRNA–miRNA cho phép xác định các gen điều hòa chính và miRNA đồng điều hòa, cung cấp những hiểu biết sâu sắc hơn về chức năng của miRNA và các gen đích quan trọng </text:span><text:bookmark-start text:name="ZOTERO_BREF_VNs9EEXG7O0Q"/><text:span text:style-name="T4">[</text:span><text:span text:style-name="T76">15</text:span><text:span text:style-name="T4">]</text:span><text:bookmark-end text:name="ZOTERO_BREF_VNs9EEXG7O0Q"/><text:span text:style-name="T4">. </text:span></text:p>
            </text:list-item>
            <text:list-item>
              <text:p text:style-name="P65"><text:span text:style-name="T4">Bên cạnh đó, mối quan hệ trực tiếp giữa miRNA và mRNA ở người được thu thập từ cơ dỡ dữ liệu TarBase (</text:span><text:a xlink:type="simple" xlink:href="http://www.diana.pcbi.upenn.edu/tarbase" text:style-name="Internet_20_link" text:visited-style-name="Visited_20_Internet_20_Link"><text:span text:style-name="Internet_20_link"><text:span text:style-name="T4">http://www.diana.pcbi.upenn.edu/tarbase</text:span></text:span></text:a><text:span text:style-name="T4">) – cơ sở dữ liệu cung cấp tập hợp tất cả các mục tiêu miRNA đã được thử nghiệm thực nghiệm với bộ sưu tập được tuyển chọn thủ công các vị trí đích của miRNA đã được thử nghiệm thực nghiệm ở người/chuột, ruồi giấm, giun và cá ngựa vằn, phân biệt giữa những vị trí cho kết quả dương tính và những vị trí cho kết quả âm tính </text:span><text:bookmark-start text:name="ZOTERO_BREF_ZfkSjALMwXmA"/><text:span text:style-name="T4">[</text:span><text:span text:style-name="T76">16</text:span><text:span text:style-name="T4">]</text:span><text:bookmark-end text:name="ZOTERO_BREF_ZfkSjALMwXmA"/><text:span text:style-name="T4">. Mỗi vị trí đích </text:span><text:soft-page-break/><text:span text:style-name="T4">dương tính được mô tả bởi miRNA liên kết với nó, gen mà nó xuất hiện, bản chất của các thí nghiệm đã được tiến hành để kiểm tra nó, tính đầy đủ của vị trí đó để gây ra sự ức chế dịch mã và/hoặc phân cắt, và bài báo mà từ đó tất cả các dữ liệu này được trích xuất </text:span><text:bookmark-start text:name="ZOTERO_BREF_MbTENBFPTGrD"/><text:span text:style-name="T4">[</text:span><text:span text:style-name="T76">16</text:span><text:span text:style-name="T4">]</text:span><text:bookmark-end text:name="ZOTERO_BREF_MbTENBFPTGrD"/><text:span text:style-name="T4">.</text:span></text:p>
            </text:list-item>
          </text:list>
        </text:list-item>
      </text:list>
      <text:p text:style-name="P46">Sau thu nhận và phân tích các thông tin của các danh sách miRNA – mRNA và tương tác giữa miRNA – miRNA, <text:span text:style-name="T88">công cụ GeneMANIA</text:span><text:span text:style-name="T89"> (multiple association network integration algorithm - </text:span><text:a xlink:type="simple" xlink:href="http://www.genemania.org/" text:style-name="Internet_20_link" text:visited-style-name="Visited_20_Internet_20_Link"><text:span text:style-name="Internet_20_link"><text:span text:style-name="T90">http://www.genemania.org/</text:span></text:span></text:a><text:span text:style-name="T89">) được sử dụng để phân tích các tương tác đa chiều, bao gồm đồng biểu hiện và tương tác vật lý.</text:span><text:bookmark-start text:name="ZOTERO_BREF_CqRQKWMCIHUZ Copy 1 Copy 1"/><text:span text:style-name="T89">[</text:span><text:span text:style-name="T91">17</text:span><text:span text:style-name="T89">]</text:span><text:bookmark-end text:name="ZOTERO_BREF_CqRQKWMCIHUZ Copy 1 Copy 1"/>. GeneMANIA sẽ mở rộng danh sách đó với các gen có chức năng tương tự mà nó xác định được bằng cách sử dụng dữ liệu hệ gen và protein có sẵn. GeneMANIA cũng báo cáo trọng số cho biết giá trị dự đoán của mỗi tập dữ liệu được chọn cho truy vấn <text:bookmark-start text:name="ZOTERO_BREF_9eUr7lv2J1YO Copy 1 Copy 1"/>[<text:span text:style-name="T87">17</text:span>]<text:bookmark-end text:name="ZOTERO_BREF_9eUr7lv2J1YO Copy 1 Copy 1"/>.</text:p>
      <text:p text:style-name="P46">Sau khi xác định miRNA tiềm năng tương tác với mRNA mục tiêu nào, phân tích làm giàu Gene Ontology (GO) và đường dẫn Kyoto Encyclopedia of Genes and Genomes (KEGG) được thực hiện để làm rõ các chức năng sinh học và cơ chế tiềm ẩn của các gen mục tiêu có tương tác với nhiều miRNA bằng cách sử dụng các gói "org.Hs.eg.db," "ggplot2," "clusterProfiler," và "enrichplot" trong R. Ngưỡng ý nghĩa P &lt; 0,05 được áp dụng để xác định kết quả làm giàu <text:bookmark-start text:name="ZOTERO_BREF_QCf4FGVkdJzI_Copy_1_Copy_1"/>[<text:span text:style-name="T87">18</text:span>]<text:bookmark-end text:name="ZOTERO_BREF_QCf4FGVkdJzI_Copy_1_Copy_1"/>.</text:p>
      <text:p text:style-name="P46">Bên cạnh các phân tích làm giàu như GO và KEGG để xác định các con đường sinh học bị ảnh hưởng, nghiên cứu sẽ ứng dụng thêm thuật toán GSEA (Gene Set Enrichment Analysis) để tìm hiểu các chức năng của các miRNA mục tiêu và các con đường sinh học tiềm năng của nó bằng cách sử dụng các gói R limma, org.Hs.eg.db, clusterProfiler và enrichplot <text:bookmark-start text:name="ZOTERO_BREF_kIe9zMe3FSia"/>[<text:span text:style-name="T87">18</text:span>]<text:bookmark-end text:name="ZOTERO_BREF_kIe9zMe3FSia"/> Dựa trên mức độ biểu hiện của các miRNA mục tiêu, các mẫu được chia thành các nhóm biểu hiện cao và biểu hiện thấp bằng cách sử dụng giá trị biểu hiện trung vị làm ngưỡng. Thay đổi gấp logarit (logFC) được tính toán cho tất cả các gen và các gen được xếp hạng tương ứng. Phân tích làm giàu được tiến hành bằng cách sử dụng các tệp tập hợp gen KEGG <text:bookmark-start text:name="ZOTERO_BREF_MubJSE1iZovc"/>[<text:span text:style-name="T87">19</text:span>]<text:bookmark-end text:name="ZOTERO_BREF_MubJSE1iZovc"/> để xác định các con đường được làm giàu đáng kể, với ngưỡng ý nghĩa là p &lt; 0,05. Cuối cùng, các biểu đồ đường cong làm giàu được tạo ra bằng cách sử dụng hàm gseaplot2 để trực quan hóa các con đường được làm giàu cho cả nhóm biểu hiện cao và nhóm biểu hiện thấp.</text:p>
      <text:p text:style-name="P47"><text:span text:style-name="T4">Cuối cùng, phân tích chức năng dữ liệu miRNA và mRNA liên quan đến bệnh tật như thế nào bằng công cụ phân tích tích hợp MIMR (</text:span><text:a xlink:type="simple" xlink:href="http://sysbio.hufs.ac.kr/MIMR" text:style-name="Internet_20_link" text:visited-style-name="Visited_20_Internet_20_Link"><text:span text:style-name="Internet_20_link"><text:span text:style-name="T4">http://sysbio.hufs.ac.kr/MIMR</text:span></text:span></text:a><text:span text:style-name="T4">). MIMR sử dụng thuật toán RWR để kết hợp thông tin mục tiêu miRNA với dữ liệu mRNA, cho phép khám phá mạng lưới tương tác protein-protein và xác định các cơ chế sinh học ẩn </text:span><text:bookmark-start text:name="ZOTERO_BREF_yBfsEnSNGUJn"/><text:span text:style-name="T4">[</text:span><text:span text:style-name="T76">20</text:span><text:span text:style-name="T4">]</text:span><text:bookmark-end text:name="ZOTERO_BREF_yBfsEnSNGUJn"/><text:span text:style-name="T4">. Thuật toán RWR cho phép chúng ta sử dụng các tương tác gián tiếp liên quan đến mục tiêu miRNA và mRNA, giúp khám phá nguyên nhân gây bệnh tiềm ẩn </text:span><text:bookmark-start text:name="ZOTERO_BREF_8Ca0Nl4OZLvs"/><text:span text:style-name="T4">[2</text:span><text:span text:style-name="T76">0</text:span><text:span text:style-name="T4">]</text:span><text:bookmark-end text:name="ZOTERO_BREF_8Ca0Nl4OZLvs"/><text:span text:style-name="T4">.</text:span></text:p>
      <text:p text:style-name="P66"/>
      <text:p text:style-name="P67">Reference paper:</text:p>
      <text:p text:style-name="P68">[9] Lacalamita, A., Piccinno, E., Scalavino, V., Bellotti, R., Giannelli, G., Serino, G.: A Gene-Based Machine Learning Classifier Associated to the Colorectal Adenoma—Carcinoma Sequence. Biomedicines. 9, 1937 (2021). <text:a xlink:type="simple" xlink:href="https://doi.org/10.3390/biomedicines9121937" text:style-name="Internet_20_link" text:visited-style-name="Visited_20_Internet_20_Link">https://doi.org/10.3390/biomedicines9121937</text:a></text:p>
      <text:p text:style-name="P69"><text:soft-page-break/>[10] Qiu, J.: An Analysis of Model Evaluation with Cross-Validation: Techniques, Applications, and Recent Advances. AEMPS. 99, 69–72 (2024). <text:a xlink:type="simple" xlink:href="https://doi.org/10.54254/2754-1169/99/2024OX0213" text:style-name="Internet_20_link" text:visited-style-name="Visited_20_Internet_20_Link">https://doi.org/10.54254/2754-1169/99/2024OX0213</text:a></text:p>
      <text:p text:style-name="P69">[11] Machine Learning-Based Prediction of the Genetic Background of Colorectal Liver Metastasis Using Mirna Expression Data. General Medicine.</text:p>
      <text:p text:style-name="P69">[12] Robin, X., Turck, N., Hainard, A., Tiberti, N., Lisacek, F., Sanchez, J.-C., Müller, M.: pROC: an open-source package for R and S+ to analyze and compare ROC curves. BMC Bioinformatics. 12, 77 (2011). <text:a xlink:type="simple" xlink:href="https://doi.org/10.1186/1471-2105-12-77" text:style-name="Internet_20_link" text:visited-style-name="Visited_20_Internet_20_Link">https://doi.org/10.1186/1471-2105-12-77</text:a></text:p>
      <text:p text:style-name="P69">[13] Ikeoka, S.: Analysis of Machine Learning Based Methods for Identifying MicroRNA Precursors. Master’s Projects. (2009). <text:a xlink:type="simple" xlink:href="https://doi.org/10.31979/etd.hvfw-ew3m" text:style-name="Internet_20_link" text:visited-style-name="Visited_20_Internet_20_Link">https://doi.org/10.31979/etd.hvfw-ew3m</text:a></text:p>
      <text:p text:style-name="P69">[14] Xu, P., Wu, Q., Yu, J., Rao, Y., Kou, Z., Fang, G., Shi, X., Liu, W., Han, H.: A Systematic Way to Infer the Regulation Relations of miRNAs on Target Genes and Critical miRNAs in Cancers. Front. Genet. 11, (2020). <text:a xlink:type="simple" xlink:href="https://doi.org/10.3389/fgene.2020.00278" text:style-name="Internet_20_link" text:visited-style-name="Visited_20_Internet_20_Link">https://doi.org/10.3389/fgene.2020.00278</text:a></text:p>
      <text:p text:style-name="P69">[15] Cui, S., Yu, S., Huang, H.-Y., Lin, Y.-C.-D., Huang, Y., Zhang, B., Xiao, J., Zuo, H., Wang, J., Li, Z., Li, G., Ma, J., Chen, B., Zhang, H., Fu, J., Wang, L., Huang, H.-D.: miRTarBase 2025: updates to the collection of experimentally validated microRNA–target interactions. Nucleic Acids Res. 53, D147–D156 (2025). https://doi.org/10.1093/nar/gkae1072</text:p>
      <text:p text:style-name="P69">[16] SETHUPATHY, P., CORDA, B., HATZIGEORGIOU, A.G.: TarBase: A comprehensive database of experimentally supported animal microRNA targets. RNA. 12, 192–197 (2006). https://doi.org/10.1261/rna.2239606</text:p>
      <text:p text:style-name="P69">[17] Warde-Farley, D., Donaldson, S.L., Comes, O., Zuberi, K., Badrawi, R., Chao, P., Franz, M., Grouios, C., Kazi, F., Lopes, C.T., Maitland, A., Mostafavi, S., Montojo, J., Shao, Q., Wright, G., Bader, G.D., Morris, Q.: The GeneMANIA prediction server: biological network integration for gene prioritization and predicting gene function. Nucleic Acids Res. 38, W214–W220 (2010). https://doi.org/10.1093/nar/gkq537</text:p>
      <text:p text:style-name="P69">[18] Gene set enrichment analysis: A knowledge-based approach for interpreting genome-wide expression profiles | PNAS, https://www.pnas.org/doi/full/10.1073/pnas.0506580102</text:p>
      <text:p text:style-name="P69">[19] Ogata, H., Goto, S., Sato, K., Fujibuchi, W., Bono, H., Kanehisa, M.: KEGG: Kyoto Encyclopedia of Genes and Genomes. Nucleic Acids Res. 27, 29–34 (1999). https://doi.org/10.1093/nar/27.1.29</text:p>
      <text:p text:style-name="P69">[20] Kim, D., Ko, Y.: MIMR: Development of a Web-Based System for miRNA and mRNA Integrated Analysis. Int J Mol Sci. 25, 11819 (2024). https://doi.org/10.3390/ijms2521118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roman" style:font-pitch="variable" style:font-charset="x-symbol"/>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style:font-face style:name="Times New Roman" svg:font-family="'Times New Roman'"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ing_20_1" style:display-name="Heading 1" style:family="paragraph" style:parent-style-name="Standard" style:next-style-name="Standard" style:default-outline-level="1" style:class="chapter">
      <style:paragraph-properties fo:text-align="center" style:justify-single-word="false" fo:orphans="0" fo:widows="0" fo:keep-with-next="always"/>
      <style:text-properties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class="chapter">
      <style:paragraph-properties fo:text-align="justify" style:justify-single-word="false" fo:keep-with-next="always" loext:word-spacing-minimum="75%" loext:word-spacing-maximum="133%"/>
      <style:text-properties fo:font-size="13pt" style:font-size-asian="13pt" style:font-size-complex="13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Standard" style:next-style-name="Standard" style:default-outline-level="2" style:list-style-name="WWNum9" style:list-level="2" style:class="chapter">
      <style:paragraph-properties fo:margin-left="0.6252in" fo:line-height="115%" fo:orphans="0" fo:widows="0" fo:keep-with-next="always"/>
      <style:text-properties fo:font-weight="bold" style:font-weight-asian="bold" style:font-weight-complex="bold"/>
    </style:style>
    <style:style style:name="ListLabel_20_28" style:display-name="ListLabel 2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55" style:display-name="ListLabel 55"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58" style:display-name="ListLabel 5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ListLabel_20_61" style:display-name="ListLabel 6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charset="x-symbol" style:font-name-complex="Wingdings" style:font-family-complex="Wingdings" style:font-family-generic-complex="system"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style:font-name-complex="Aptos2" style:font-family-complex="Apto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Aptos1" fo:font-family="Aptos" style:font-family-generic="roman" style:font-pitch="variable" style:font-charset="x-symbol" style:font-name-complex="Symbol" style:font-family-complex="Symbol" style:font-family-generic-complex="system" style:font-pitch-complex="variable"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Aptos1" fo:font-family="Aptos" style:font-family-generic="roman" style:font-pitch="variable" style:font-charset="x-symbol" style:font-name-complex="Symbol" style:font-family-complex="Symbol" style:font-family-generic-complex="system" style:font-pitch-complex="variable" style:font-charset-complex="x-symbol"/>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ptos1" fo:font-family="Aptos" style:font-family-generic="roman" style:font-pitch="variable" style:font-charset="x-symbol"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8" style:display-name="ListLabel 78"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79" style:display-name="ListLabel 79"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1" style:display-name="ListLabel 81" style:family="text">
      <style:text-properties style:font-name="Times New Roman" fo:font-family="'Times New Roman'" style:font-family-generic="roman" style:font-pitch="variable" style:font-charset="x-symbol" style:font-name-complex="Symbol" style:font-family-complex="Symbol" style:font-family-generic-complex="system" style:font-pitch-complex="variable" style:font-charset-complex="x-symbol"/>
    </style:style>
    <style:style style:name="ListLabel_20_82" style:display-name="ListLabel 82"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3" style:display-name="ListLabel 83"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6" style:display-name="ListLabel 86"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9" style:display-name="ListLabel 89"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Times New Roman" fo:font-family="'Times New Roman'" style:font-family-generic="roman" style:font-pitch="variable" style:font-charset="x-symbol" style:font-name-complex="OpenSymbol1" style:font-family-complex="OpenSymbol" style:font-family-generic-complex="system" style:font-pitch-complex="variable"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8402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is-legal="true" loext:num-list-format="%1%.%2%" style:num-format="1" text:display-levels="2">
        <style:list-level-properties text:list-level-position-and-space-mode="label-alignment">
          <style:list-level-label-alignment text:label-followed-by="listtab" fo:text-indent="-0.2917in" fo:margin-left="0.5417in"/>
        </style:list-level-properties>
      </text:list-level-style-number>
      <text:list-level-style-number text:level="3" text:style-name="ListLabel_20_21"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2" loext:is-legal="true" loext:num-list-format="%1%.%2%.%3%.%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23"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4" loext:is-legal="true" loext:num-list-format="%1%.%2%.%3%.%4%.%5%.%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25"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6" loext:is-legal="true" loext:num-list-format="%1%.%2%.%3%.%4%.%5%.%6%.%7%.%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27" loext:is-legal="true" loext:num-list-format="%1%.%2%.%3%.%4%.%5%.%6%.%7%.%8%.%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3in" fo:margin-left="0.3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pitch="variable"/>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5T21:33:42.419116200</meta:creation-date>
    <meta:generator>LibreOffice/26.2.4.2$Windows_X86_64 LibreOffice_project/0229ac93fcf0d7cbc6376066c6f35021cef002dc</meta:generator>
    <dc:date>2026-07-05T01:25:17.332203800</dc:date>
    <meta:editing-duration>PT4H2M24S</meta:editing-duration>
    <meta:editing-cycles>8</meta:editing-cycles>
    <meta:document-statistic meta:table-count="0" meta:image-count="1" meta:object-count="8" meta:page-count="11" meta:paragraph-count="113" meta:word-count="5804" meta:character-count="29630" meta:non-whitespace-character-count="23941"/>
  </office:meta>
</office:document-meta>
</file>

<file path=Object 1/content.xml><?xml version="1.0" encoding="utf-8"?>
<math xmlns="http://www.w3.org/1998/Math/MathML" display="block">
  <semantics>
    <mfrac>
      <mrow>
        <mi>x</mi>
        <mtext>-</mtext>
        <mi>μ</mi>
      </mrow>
      <mi>σ</mi>
    </mfrac>
    <annotation encoding="StarMath 5.0">{x "-" μ} over {σ}</annotation>
  </semantics>
</math>
</file>

<file path=Object 2/content.xml><?xml version="1.0" encoding="utf-8"?>
<math xmlns="http://www.w3.org/1998/Math/MathML" display="block">
  <semantics>
    <mfrac>
      <mi mathvariant="italic">TP</mi>
      <mrow>
        <mo stretchy="false">(</mo>
        <msub>
          <mi mathvariant="italic">TP</mi>
          <mi>i</mi>
        </msub>
        <mtext>+</mtext>
        <msub>
          <mi mathvariant="italic">FN</mi>
          <mi>i</mi>
        </msub>
        <mo stretchy="false">)</mo>
      </mrow>
    </mfrac>
    <annotation encoding="StarMath 5.0">{TP} over {\( {TP} rsub {i} "+" {FN} rsub {i} \)}</annotation>
  </semantics>
</math>
</file>

<file path=Object 3/content.xml><?xml version="1.0" encoding="utf-8"?>
<math xmlns="http://www.w3.org/1998/Math/MathML" display="block">
  <semantics>
    <mfrac>
      <msub>
        <mi mathvariant="italic">TN</mi>
        <mi>i</mi>
      </msub>
      <mrow>
        <mo stretchy="false">(</mo>
        <msub>
          <mi mathvariant="italic">TN</mi>
          <mi>i</mi>
        </msub>
        <mtext>+</mtext>
        <msub>
          <mi mathvariant="italic">FP</mi>
          <mi>i</mi>
        </msub>
        <mo stretchy="false">)</mo>
      </mrow>
    </mfrac>
    <annotation encoding="StarMath 5.0">{{TN} rsub {i}} over {\( {TN} rsub {i} "+" {FP} rsub {i} \)}</annotation>
  </semantics>
</math>
</file>

<file path=Object 4/content.xml><?xml version="1.0" encoding="utf-8"?>
<math xmlns="http://www.w3.org/1998/Math/MathML" display="block">
  <semantics>
    <mfrac>
      <mrow>
        <msub>
          <mi mathvariant="italic">TP</mi>
          <mi>i</mi>
        </msub>
        <mtext>+</mtext>
        <msub>
          <mi mathvariant="italic">TN</mi>
          <mi>i</mi>
        </msub>
      </mrow>
      <mrow>
        <msub>
          <mi mathvariant="italic">TP</mi>
          <mi>i</mi>
        </msub>
        <mtext>+</mtext>
        <msub>
          <mi mathvariant="italic">TN</mi>
          <mi>i</mi>
        </msub>
        <mtext>+</mtext>
        <msub>
          <mi mathvariant="italic">FP</mi>
          <mi>i</mi>
        </msub>
        <mtext>+</mtext>
        <msub>
          <mi mathvariant="italic">FN</mi>
          <mi>i</mi>
        </msub>
      </mrow>
    </mfrac>
    <annotation encoding="StarMath 5.0">{{TP} rsub {i} "+" {TN} rsub {i}} over {{TP} rsub {i} "+" {TN} rsub {i} "+" {FP} rsub {i} "+" {FN} rsub {i}}</annotation>
  </semantics>
</math>
</file>

<file path=Object 5/content.xml><?xml version="1.0" encoding="utf-8"?>
<math xmlns="http://www.w3.org/1998/Math/MathML" display="block">
  <semantics>
    <mfrac>
      <mrow>
        <mrow>
          <mo fence="true" form="prefix" stretchy="true">(</mo>
          <mrow>
            <mrow>
              <mi mathvariant="italic">TP</mi>
              <mi>×</mi>
              <mi mathvariant="italic">TN</mi>
            </mrow>
          </mrow>
          <mo fence="true" form="postfix" stretchy="true">)</mo>
        </mrow>
        <mtext>-</mtext>
        <mo stretchy="false">(</mo>
        <mi mathvariant="italic">FP</mi>
        <mi>×</mi>
        <mi mathvariant="italic">FN</mi>
        <mo stretchy="false">)</mo>
      </mrow>
      <msqrt>
        <mrow>
          <mrow>
            <mo fence="true" form="prefix" stretchy="true">(</mo>
            <mrow>
              <mrow>
                <mi mathvariant="italic">TP</mi>
                <mtext>+</mtext>
                <mi mathvariant="italic">FP</mi>
              </mrow>
            </mrow>
            <mo fence="true" form="postfix" stretchy="true">)</mo>
          </mrow>
          <mi>×</mi>
          <mrow>
            <mo fence="true" form="prefix" stretchy="true">(</mo>
            <mrow>
              <mrow>
                <mi mathvariant="italic">TN</mi>
                <mtext>+</mtext>
                <mi mathvariant="italic">FN</mi>
              </mrow>
            </mrow>
            <mo fence="true" form="postfix" stretchy="true">)</mo>
          </mrow>
          <mi>×</mi>
          <mrow>
            <mo fence="true" form="prefix" stretchy="true">(</mo>
            <mrow>
              <mrow>
                <mi mathvariant="italic">TP</mi>
                <mtext>+</mtext>
                <mi mathvariant="italic">FN</mi>
              </mrow>
            </mrow>
            <mo fence="true" form="postfix" stretchy="true">)</mo>
          </mrow>
          <mi>×</mi>
          <mo stretchy="false">(</mo>
          <mi mathvariant="italic">TN</mi>
          <mtext>+</mtext>
          <mi mathvariant="italic">FP</mi>
          <mo stretchy="false">)</mo>
        </mrow>
      </msqrt>
    </mfrac>
    <annotation encoding="StarMath 5.0">{left (TP × TN right ) "-" \( FP × FN \)} over {sqrt {left (TP "+" FP right ) × left (TN "+" FN right ) × left (TP "+" FN right ) × \( TN "+" FP \)}}</annotation>
  </semantics>
</math>
</file>

<file path=Object 6/content.xml><?xml version="1.0" encoding="utf-8"?>
<math xmlns="http://www.w3.org/1998/Math/MathML" display="block">
  <semantics>
    <mfrac>
      <mi mathvariant="italic">TP</mi>
      <mrow>
        <mo stretchy="false">(</mo>
        <mi mathvariant="italic">TP</mi>
        <mtext>+</mtext>
        <mi mathvariant="italic">FP</mi>
        <mo stretchy="false">)</mo>
      </mrow>
    </mfrac>
    <annotation encoding="StarMath 5.0">{TP} over {\( TP "+" FP \)}</annotation>
  </semantics>
</math>
</file>

<file path=Object 7/content.xml><?xml version="1.0" encoding="utf-8"?>
<math xmlns="http://www.w3.org/1998/Math/MathML" display="block">
  <semantics>
    <mfrac>
      <mi mathvariant="italic">TP</mi>
      <mrow>
        <mi mathvariant="italic">TP</mi>
        <mtext>+</mtext>
        <mi mathvariant="italic">FP</mi>
      </mrow>
    </mfrac>
    <annotation encoding="StarMath 5.0">{TP} over {TP "+" FP}</annotation>
  </semantics>
</math>
</file>

<file path=Object 8/content.xml><?xml version="1.0" encoding="utf-8"?>
<math xmlns="http://www.w3.org/1998/Math/MathML" display="block">
  <semantics>
    <mfrac>
      <mrow>
        <mtext>Prec </mtext>
        <mi>x</mi>
        <mtext> </mtext>
        <mi mathvariant="italic">Sens</mi>
      </mrow>
      <mrow>
        <mtext>Prec+</mtext>
        <mi mathvariant="italic">Sens</mi>
      </mrow>
    </mfrac>
    <annotation encoding="StarMath 5.0">{"Prec " x " " Sens} over {"Prec+" Sens}</annotation>
  </semantics>
</math>
</file>